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B6000000A8F90AF2BC.png" manifest:media-type="image/png"/>
  <manifest:file-entry manifest:full-path="Pictures/1000000100000789000000DC4727CA4F.png" manifest:media-type="image/png"/>
  <manifest:file-entry manifest:full-path="Pictures/100000010000077B000002AAC76555BE.png" manifest:media-type="image/png"/>
  <manifest:file-entry manifest:full-path="Pictures/10000001000003D000000082D0300425.png" manifest:media-type="image/png"/>
  <manifest:file-entry manifest:full-path="Pictures/10000001000003EC000000A44B47C1AE.png" manifest:media-type="image/png"/>
  <manifest:file-entry manifest:full-path="Pictures/100000010000079200000345EFA32776.png" manifest:media-type="image/png"/>
  <manifest:file-entry manifest:full-path="Pictures/100000010000031E0000039E80F6A632.png" manifest:media-type="image/png"/>
  <manifest:file-entry manifest:full-path="Pictures/1000000100000541000003BE951ACBD9.png" manifest:media-type="image/png"/>
  <manifest:file-entry manifest:full-path="Pictures/10000001000005620000014266583BE5.png" manifest:media-type="image/png"/>
  <manifest:file-entry manifest:full-path="Pictures/100000010000027300000149E2003FB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swiss"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roman" style:font-pitch="variable"/>
    <style:font-face style:name="Consolas1" svg:font-family="Consolas" style:font-family-generic="swiss" style:font-pitch="variable"/>
    <style:font-face style:name="Consolas2" svg:font-family="Consolas"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Contents_20_Heading">
      <style:text-properties fo:language="en" fo:country="US" officeooo:rsid="00166895" officeooo:paragraph-rsid="00166895"/>
    </style:style>
    <style:style style:name="P2" style:family="paragraph" style:parent-style-name="Standard">
      <style:text-properties fo:language="en" fo:country="US" officeooo:rsid="001a422f" officeooo:paragraph-rsid="001a422f"/>
    </style:style>
    <style:style style:name="P3" style:family="paragraph" style:parent-style-name="Standard">
      <style:text-properties fo:language="en" fo:country="US" officeooo:rsid="008744eb" officeooo:paragraph-rsid="008744eb"/>
    </style:style>
    <style:style style:name="P4" style:family="paragraph" style:parent-style-name="Contents_20_1">
      <style:paragraph-properties>
        <style:tab-stops>
          <style:tab-stop style:position="18.459cm" style:type="right" style:leader-style="dotted" style:leader-text="."/>
        </style:tab-stops>
      </style:paragraph-properties>
    </style:style>
    <style:style style:name="P5" style:family="paragraph" style:parent-style-name="Contents_20_2">
      <style:paragraph-properties>
        <style:tab-stops>
          <style:tab-stop style:position="18.459cm" style:type="right" style:leader-style="dotted" style:leader-text="."/>
        </style:tab-stops>
      </style:paragraph-properties>
    </style:style>
    <style:style style:name="P6" style:family="paragraph" style:parent-style-name="Contents_20_3">
      <style:paragraph-properties>
        <style:tab-stops>
          <style:tab-stop style:position="18.459cm" style:type="right" style:leader-style="dotted" style:leader-text="."/>
        </style:tab-stops>
      </style:paragraph-properties>
    </style:style>
    <style:style style:name="P7" style:family="paragraph" style:parent-style-name="Heading_20_1">
      <style:text-properties fo:language="en" fo:country="US"/>
    </style:style>
    <style:style style:name="P8" style:family="paragraph" style:parent-style-name="Standard">
      <style:text-properties fo:language="en" fo:country="US" officeooo:rsid="00166895" officeooo:paragraph-rsid="00166895"/>
    </style:style>
    <style:style style:name="P9" style:family="paragraph" style:parent-style-name="Standard">
      <style:text-properties fo:language="en" fo:country="US" officeooo:rsid="0047a4cb" officeooo:paragraph-rsid="0047a4cb"/>
    </style:style>
    <style:style style:name="P10" style:family="paragraph" style:parent-style-name="Standard">
      <style:text-properties fo:language="en" fo:country="US" officeooo:rsid="0022d382" officeooo:paragraph-rsid="0022d382"/>
    </style:style>
    <style:style style:name="P11" style:family="paragraph" style:parent-style-name="Heading_20_2">
      <style:text-properties fo:language="en" fo:country="US"/>
    </style:style>
    <style:style style:name="P12" style:family="paragraph" style:parent-style-name="No_20_Spacing">
      <style:paragraph-properties fo:margin-left="-0.009cm" fo:text-indent="-0.018cm" style:auto-text-indent="false"/>
      <style:text-properties fo:language="en" fo:country="US" fo:font-weight="normal" officeooo:rsid="006bc816" officeooo:paragraph-rsid="004de923" fo:background-color="transparent" style:font-weight-asian="normal" style:font-size-complex="11pt" style:font-weight-complex="normal"/>
    </style:style>
    <style:style style:name="P13" style:family="paragraph" style:parent-style-name="Heading_20_2">
      <style:text-properties fo:language="en" fo:country="US" officeooo:rsid="004de923" officeooo:paragraph-rsid="004de923"/>
    </style:style>
    <style:style style:name="P14" style:family="paragraph" style:parent-style-name="Standard">
      <style:text-properties fo:font-weight="bold" officeooo:rsid="00501540" officeooo:paragraph-rsid="00501540" fo:background-color="transparent" style:font-weight-asian="bold" style:font-weight-complex="bold"/>
    </style:style>
    <style:style style:name="P15" style:family="paragraph" style:parent-style-name="Heading_20_3">
      <style:text-properties fo:language="en" fo:country="US"/>
    </style:style>
    <style:style style:name="P16" style:family="paragraph" style:parent-style-name="Standard">
      <style:text-properties fo:language="en" fo:country="US" officeooo:paragraph-rsid="004de923"/>
    </style:style>
    <style:style style:name="P17" style:family="paragraph" style:parent-style-name="No_20_Spacing">
      <style:text-properties fo:language="en" fo:country="US" officeooo:paragraph-rsid="004de923"/>
    </style:style>
    <style:style style:name="P18" style:family="paragraph" style:parent-style-name="Heading_20_3">
      <style:text-properties fo:language="en" fo:country="US" officeooo:paragraph-rsid="004de923"/>
    </style:style>
    <style:style style:name="P19" style:family="paragraph" style:parent-style-name="No_20_Spacing">
      <style:text-properties fo:language="en" fo:country="US" fo:font-style="italic" officeooo:paragraph-rsid="004de923" style:font-style-asian="italic" style:font-style-complex="italic"/>
    </style:style>
    <style:style style:name="P20" style:family="paragraph" style:parent-style-name="No_20_Spacing">
      <style:text-properties officeooo:paragraph-rsid="004de923"/>
    </style:style>
    <style:style style:name="P21" style:family="paragraph" style:parent-style-name="No_20_Spacing" style:list-style-name="WWNum3">
      <style:text-properties fo:language="en" fo:country="US" officeooo:paragraph-rsid="004de923"/>
    </style:style>
    <style:style style:name="P22" style:family="paragraph" style:parent-style-name="Standard">
      <style:text-properties officeooo:paragraph-rsid="004de923"/>
    </style:style>
    <style:style style:name="P23" style:family="paragraph" style:parent-style-name="Text_20_body">
      <style:text-properties fo:language="en" fo:country="US" officeooo:rsid="002a8e8b" officeooo:paragraph-rsid="002a8e8b"/>
    </style:style>
    <style:style style:name="P24" style:family="paragraph" style:parent-style-name="Text_20_body">
      <style:text-properties fo:font-size="10pt" fo:language="en" fo:country="US" officeooo:rsid="004a70d8" officeooo:paragraph-rsid="004a70d8" fo:background-color="transparent" style:font-size-asian="10pt" style:font-size-complex="10pt"/>
    </style:style>
    <style:style style:name="P25" style:family="paragraph" style:parent-style-name="Text_20_body">
      <style:text-properties fo:language="en" fo:country="US" officeooo:rsid="002a8e8b" officeooo:paragraph-rsid="002a8e8b" fo:background-color="#ffff00"/>
    </style:style>
    <style:style style:name="P26" style:family="paragraph" style:parent-style-name="Text_20_body">
      <style:text-properties fo:language="en" fo:country="US" officeooo:rsid="002a8e8b" officeooo:paragraph-rsid="002a8e8b" fo:background-color="transparent"/>
    </style:style>
    <style:style style:name="P27"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11pt" fo:language="en" fo:country="US" style:font-size-asian="11pt"/>
    </style:style>
    <style:style style:name="P28"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11pt" fo:language="en" fo:country="US" officeooo:rsid="00624881" officeooo:paragraph-rsid="00624881" style:font-size-asian="11pt" style:font-size-complex="11pt"/>
    </style:style>
    <style:style style:name="P29"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9pt" fo:language="en" fo:country="US" officeooo:rsid="00624881" officeooo:paragraph-rsid="00624881" style:font-size-asian="9pt" style:font-size-complex="9pt"/>
    </style:style>
    <style:style style:name="P30"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11pt" fo:language="en" fo:country="US" officeooo:rsid="00679d38" officeooo:paragraph-rsid="00679d38" style:font-size-asian="11pt" style:font-size-complex="11pt"/>
    </style:style>
    <style:style style:name="P31" style:family="paragraph" style:parent-style-name="Text_20_body">
      <style:text-properties fo:font-size="9pt" fo:language="en" fo:country="US" officeooo:rsid="002a8e8b" officeooo:paragraph-rsid="00663b0b" fo:background-color="transparent" style:font-size-asian="9pt" style:font-size-complex="9pt"/>
    </style:style>
    <style:style style:name="P32"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9pt" fo:language="en" fo:country="US" style:font-size-asian="9pt" style:font-size-complex="9pt"/>
    </style:style>
    <style:style style:name="P33"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9pt" fo:language="en" fo:country="US" fo:background-color="#ffff00" style:font-size-asian="9pt" style:font-size-complex="9pt"/>
    </style:style>
    <style:style style:name="P34"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11pt" fo:language="en" fo:country="US" officeooo:rsid="0080df7e" officeooo:paragraph-rsid="0080df7e" style:font-size-asian="11pt" style:font-size-complex="11pt"/>
    </style:style>
    <style:style style:name="P35"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11pt" fo:language="en" fo:country="US" fo:font-style="normal" officeooo:rsid="0080df7e" officeooo:paragraph-rsid="0080df7e" style:font-size-asian="11pt" style:font-style-asian="normal" style:font-size-complex="11pt" style:font-style-complex="normal"/>
    </style:style>
    <style:style style:name="P36"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11pt" fo:language="en" fo:country="US" fo:font-style="normal" officeooo:rsid="008845eb" officeooo:paragraph-rsid="008845eb" style:font-size-asian="11pt" style:font-style-asian="normal" style:font-size-complex="11pt" style:font-style-complex="normal"/>
    </style:style>
    <style:style style:name="P37" style:family="paragraph" style:parent-style-name="Heading_20_1">
      <style:paragraph-properties fo:break-before="page"/>
      <style:text-properties fo:language="en" fo:country="US"/>
    </style:style>
    <style:style style:name="P38" style:family="paragraph" style:parent-style-name="Standard">
      <style:text-properties fo:language="en" fo:country="US" officeooo:rsid="00166895" officeooo:paragraph-rsid="0019bf88"/>
    </style:style>
    <style:style style:name="P39" style:family="paragraph" style:parent-style-name="Standard">
      <style:text-properties fo:language="en" fo:country="US" fo:font-weight="bold" officeooo:rsid="0019bf88" officeooo:paragraph-rsid="0019bf88" style:font-weight-asian="bold" style:font-weight-complex="bold"/>
    </style:style>
    <style:style style:name="P40" style:family="paragraph" style:parent-style-name="Standard">
      <style:text-properties fo:language="en" fo:country="US" officeooo:rsid="0019bf88" officeooo:paragraph-rsid="0019bf88"/>
    </style:style>
    <style:style style:name="P41" style:family="paragraph" style:parent-style-name="Standard">
      <style:text-properties fo:language="en" fo:country="US" officeooo:rsid="001e6888" officeooo:paragraph-rsid="0019bf88"/>
    </style:style>
    <style:style style:name="P42" style:family="paragraph" style:parent-style-name="Standard">
      <style:paragraph-properties fo:break-before="page"/>
      <style:text-properties fo:language="en" fo:country="US" officeooo:rsid="001e6888" officeooo:paragraph-rsid="001e6888"/>
    </style:style>
    <style:style style:name="P43" style:family="paragraph" style:parent-style-name="Standard">
      <style:text-properties fo:language="en" fo:country="US" officeooo:rsid="001c9724" officeooo:paragraph-rsid="003918a6"/>
    </style:style>
    <style:style style:name="P44" style:family="paragraph" style:parent-style-name="Standard">
      <style:text-properties fo:language="en" fo:country="US" fo:font-style="normal" fo:font-weight="normal" officeooo:rsid="001c9724" officeooo:paragraph-rsid="003918a6" style:font-style-asian="normal" style:font-weight-asian="normal" style:font-style-complex="normal" style:font-weight-complex="normal"/>
    </style:style>
    <style:style style:name="P45" style:family="paragraph" style:parent-style-name="Standard">
      <style:text-properties fo:language="en" fo:country="US" officeooo:rsid="0019bf88" officeooo:paragraph-rsid="003918a6"/>
    </style:style>
    <style:style style:name="P46" style:family="paragraph" style:parent-style-name="Standard">
      <style:text-properties fo:language="en" fo:country="US" officeooo:rsid="002a8e8b" officeooo:paragraph-rsid="003918a6"/>
    </style:style>
    <style:style style:name="P47" style:family="paragraph" style:parent-style-name="Standard">
      <style:text-properties fo:language="en" fo:country="US" fo:font-style="normal" fo:font-weight="normal" officeooo:rsid="002c8ce7" officeooo:paragraph-rsid="003918a6" style:font-style-asian="normal" style:font-weight-asian="normal" style:font-style-complex="normal" style:font-weight-complex="normal"/>
    </style:style>
    <style:style style:name="P48"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11pt" fo:language="en" fo:country="US" officeooo:paragraph-rsid="003918a6" style:font-size-asian="11pt"/>
    </style:style>
    <style:style style:name="P49" style:family="paragraph" style:parent-style-name="Standard">
      <style:text-properties fo:language="en" fo:country="US" officeooo:rsid="001e6888" officeooo:paragraph-rsid="003918a6"/>
    </style:style>
    <style:style style:name="P50" style:family="paragraph" style:parent-style-name="Standard">
      <style:text-properties fo:language="en" fo:country="US" officeooo:rsid="002a8e8b" officeooo:paragraph-rsid="002a8e8b"/>
    </style:style>
    <style:style style:name="P51" style:family="paragraph" style:parent-style-name="Standard">
      <style:text-properties fo:language="en" fo:country="US" fo:font-style="normal" fo:font-weight="normal" officeooo:rsid="003553d4" officeooo:paragraph-rsid="003553d4" style:font-style-asian="normal" style:font-weight-asian="normal" style:font-style-complex="normal" style:font-weight-complex="normal"/>
    </style:style>
    <style:style style:name="P52" style:family="paragraph" style:parent-style-name="Standard">
      <style:text-properties fo:language="en" fo:country="US" fo:font-style="normal" fo:font-weight="normal" officeooo:rsid="001f36c6" officeooo:paragraph-rsid="001f36c6" style:font-style-asian="normal" style:font-weight-asian="normal" style:font-style-complex="normal" style:font-weight-complex="normal"/>
    </style:style>
    <style:style style:name="P53" style:family="paragraph" style:parent-style-name="Standard">
      <style:text-properties fo:language="en" fo:country="US" fo:font-style="normal" fo:font-weight="normal" officeooo:rsid="0020f348" officeooo:paragraph-rsid="0020f348" style:font-style-asian="normal" style:font-weight-asian="normal" style:font-style-complex="normal" style:font-weight-complex="normal"/>
    </style:style>
    <style:style style:name="P54" style:family="paragraph" style:parent-style-name="Standard">
      <style:text-properties fo:language="en" fo:country="US" fo:font-style="normal" fo:font-weight="normal" officeooo:rsid="001c9724" officeooo:paragraph-rsid="003a5f96" style:font-style-asian="normal" style:font-weight-asian="normal" style:font-style-complex="normal" style:font-weight-complex="normal"/>
    </style:style>
    <style:style style:name="P55" style:family="paragraph" style:parent-style-name="Standard">
      <style:text-properties fo:language="en" fo:country="US" fo:font-style="normal" fo:font-weight="normal" officeooo:rsid="003a5f96" officeooo:paragraph-rsid="003a5f96" fo:background-color="transparent" style:font-style-asian="normal" style:font-weight-asian="normal" style:font-style-complex="normal" style:font-weight-complex="normal"/>
    </style:style>
    <style:style style:name="P56" style:family="paragraph" style:parent-style-name="Standard">
      <style:text-properties fo:language="en" fo:country="US" fo:font-style="normal" fo:font-weight="normal" officeooo:rsid="003553d4" officeooo:paragraph-rsid="003a5f96" style:font-style-asian="normal" style:font-weight-asian="normal" style:font-style-complex="normal" style:font-weight-complex="normal"/>
    </style:style>
    <style:style style:name="P57" style:family="paragraph" style:parent-style-name="Standard">
      <style:paragraph-properties fo:break-before="page"/>
      <style:text-properties fo:language="en" fo:country="US" fo:font-style="normal" fo:font-weight="normal" officeooo:rsid="001f36c6" officeooo:paragraph-rsid="001f36c6" style:font-style-asian="normal" style:font-weight-asian="normal" style:font-style-complex="normal" style:font-weight-complex="normal"/>
    </style:style>
    <style:style style:name="P58" style:family="paragraph" style:parent-style-name="Standard">
      <style:text-properties fo:language="en" fo:country="US" fo:font-style="normal" fo:font-weight="normal" officeooo:rsid="00539843" officeooo:paragraph-rsid="00539843" style:font-style-asian="normal" style:font-weight-asian="normal" style:font-style-complex="normal" style:font-weight-complex="normal"/>
    </style:style>
    <style:style style:name="P59"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11pt" fo:language="en" fo:country="US" fo:font-style="normal" fo:font-weight="normal" officeooo:rsid="001f36c6" style:font-size-asian="11pt" style:font-style-asian="normal" style:font-weight-asian="normal" style:font-style-complex="normal" style:font-weight-complex="normal"/>
    </style:style>
    <style:style style:name="P60" style:family="paragraph" style:parent-style-name="Standard">
      <style:text-properties fo:font-size="10pt" fo:language="en" fo:country="US" fo:font-style="normal" fo:font-weight="normal" officeooo:rsid="003fe4ac" officeooo:paragraph-rsid="003fe4ac" style:font-size-asian="10pt" style:font-style-asian="normal" style:font-weight-asian="normal" style:font-size-complex="10pt" style:font-style-complex="normal" style:font-weight-complex="normal"/>
    </style:style>
    <style:style style:name="P61" style:family="paragraph" style:parent-style-name="Standard">
      <style:text-properties fo:language="en" fo:country="US" fo:font-style="normal" fo:font-weight="normal" officeooo:rsid="003c9840" officeooo:paragraph-rsid="003c9840" style:font-style-asian="normal" style:font-weight-asian="normal" style:font-style-complex="normal" style:font-weight-complex="normal"/>
    </style:style>
    <style:style style:name="P62" style:family="paragraph" style:parent-style-name="Standard">
      <style:text-properties fo:language="en" fo:country="US" fo:font-style="normal" fo:font-weight="normal" officeooo:rsid="002c8ce7" officeooo:paragraph-rsid="002c8ce7" style:font-style-asian="normal" style:font-weight-asian="normal" style:font-style-complex="normal" style:font-weight-complex="normal"/>
    </style:style>
    <style:style style:name="P63" style:family="paragraph" style:parent-style-name="Standard">
      <style:text-properties fo:language="en" fo:country="US" fo:font-style="normal" fo:font-weight="normal" officeooo:rsid="00624881" officeooo:paragraph-rsid="00624881" style:font-style-asian="normal" style:font-weight-asian="normal" style:font-style-complex="normal" style:font-weight-complex="normal"/>
    </style:style>
    <style:style style:name="P64" style:family="paragraph" style:parent-style-name="Standard">
      <style:text-properties fo:language="en" fo:country="US" fo:font-style="normal" fo:font-weight="normal" officeooo:rsid="005a5f98" officeooo:paragraph-rsid="005a5f98" style:font-style-asian="normal" style:font-weight-asian="normal" style:font-style-complex="normal" style:font-weight-complex="normal"/>
    </style:style>
    <style:style style:name="P65" style:family="paragraph" style:parent-style-name="Standard">
      <style:text-properties fo:language="en" fo:country="US" fo:font-style="normal" fo:font-weight="normal" officeooo:rsid="007e9962" officeooo:paragraph-rsid="007e9962" style:font-style-asian="normal" style:font-weight-asian="normal" style:font-style-complex="normal" style:font-weight-complex="normal"/>
    </style:style>
    <style:style style:name="P66" style:family="paragraph" style:parent-style-name="Heading_20_1">
      <style:text-properties fo:language="en" fo:country="US" officeooo:paragraph-rsid="005a5f98"/>
    </style:style>
    <style:style style:name="P67"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officeooo:paragraph-rsid="005a5f98"/>
    </style:style>
    <style:style style:name="P68"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font-size="11pt" fo:language="en" fo:country="US" officeooo:paragraph-rsid="005a5f98" style:font-size-asian="11pt"/>
    </style:style>
    <style:style style:name="P69" style:family="paragraph" style:parent-style-name="Standard">
      <style:text-properties fo:language="en" fo:country="US" fo:font-style="normal" fo:font-weight="normal" officeooo:rsid="007fe269" officeooo:paragraph-rsid="007fe269" style:font-style-asian="normal" style:font-weight-asian="normal" style:font-style-complex="normal" style:font-weight-complex="normal"/>
    </style:style>
    <style:style style:name="P70" style:family="paragraph" style:parent-style-name="Standard">
      <style:text-properties fo:language="en" fo:country="US" fo:font-style="normal" fo:font-weight="normal" officeooo:rsid="00420de6" officeooo:paragraph-rsid="00447269" style:font-style-asian="normal" style:font-weight-asian="normal" style:font-style-complex="normal" style:font-weight-complex="normal"/>
    </style:style>
    <style:style style:name="P71" style:family="paragraph" style:parent-style-name="Standard">
      <style:text-properties fo:language="nl" fo:country="NL" fo:font-style="normal" fo:font-weight="normal" officeooo:rsid="007fe269" officeooo:paragraph-rsid="007fe269" style:font-style-asian="normal" style:font-weight-asian="normal" style:font-style-complex="normal" style:font-weight-complex="normal"/>
    </style:style>
    <style:style style:name="P72" style:family="paragraph" style:parent-style-name="Standard">
      <style:text-properties fo:language="en" fo:country="US" fo:font-style="normal" fo:font-weight="normal" officeooo:rsid="0072a9ec" officeooo:paragraph-rsid="008274e2" style:font-style-asian="normal" style:font-weight-asian="normal" style:font-style-complex="normal" style:font-weight-complex="normal"/>
    </style:style>
    <style:style style:name="P73" style:family="paragraph" style:parent-style-name="Standard">
      <style:text-properties fo:language="en" fo:country="US" fo:font-style="normal" fo:font-weight="normal" officeooo:rsid="008274e2" officeooo:paragraph-rsid="008274e2" style:font-style-asian="normal" style:font-weight-asian="normal" style:font-style-complex="normal" style:font-weight-complex="normal"/>
    </style:style>
    <style:style style:name="P74" style:family="paragraph" style:parent-style-name="Standard">
      <style:text-properties fo:language="en" fo:country="US" fo:font-style="italic" fo:font-weight="normal" officeooo:rsid="007db452" officeooo:paragraph-rsid="008274e2" style:font-style-asian="italic" style:font-weight-asian="normal" style:font-style-complex="italic" style:font-weight-complex="normal"/>
    </style:style>
    <style:style style:name="P75" style:family="paragraph" style:parent-style-name="Standard">
      <style:text-properties fo:language="en" fo:country="US" fo:font-style="italic" fo:font-weight="normal" officeooo:rsid="008274e2" officeooo:paragraph-rsid="008274e2" style:font-style-asian="italic" style:font-weight-asian="normal" style:font-style-complex="italic" style:font-weight-complex="normal"/>
    </style:style>
    <style:style style:name="P76" style:family="paragraph" style:parent-style-name="Standard">
      <style:text-properties fo:language="en" fo:country="US" fo:font-style="italic" fo:font-weight="normal" officeooo:rsid="007db452" officeooo:paragraph-rsid="007db452" style:font-style-asian="italic" style:font-weight-asian="normal" style:font-style-complex="italic" style:font-weight-complex="normal"/>
    </style:style>
    <style:style style:name="P77" style:family="paragraph" style:parent-style-name="Standard">
      <style:text-properties fo:language="en" fo:country="US" fo:font-style="normal" fo:font-weight="normal" officeooo:rsid="00447269" officeooo:paragraph-rsid="00447269" style:font-style-asian="normal" style:font-weight-asian="normal" style:font-style-complex="normal" style:font-weight-complex="normal"/>
    </style:style>
    <style:style style:name="P78" style:family="paragraph" style:parent-style-name="Standard">
      <style:text-properties fo:language="en" fo:country="US"/>
    </style:style>
    <style:style style:name="P79" style:family="paragraph" style:parent-style-name="Standard">
      <style:text-properties fo:language="en" fo:country="US" fo:font-style="normal" fo:font-weight="normal" officeooo:rsid="0057b873" officeooo:paragraph-rsid="0057b873" style:font-style-asian="normal" style:font-weight-asian="normal" style:font-style-complex="normal" style:font-weight-complex="normal" text:display="none"/>
    </style:style>
    <style:style style:name="P80" style:family="paragraph" style:parent-style-name="Standard">
      <style:text-properties fo:language="en" fo:country="US" fo:font-style="normal" fo:font-weight="normal" officeooo:rsid="005d6ca1" officeooo:paragraph-rsid="005d6ca1" style:font-style-asian="normal" style:font-weight-asian="normal" style:font-style-complex="normal" style:font-weight-complex="normal" text:display="none"/>
    </style:style>
    <style:style style:name="P81" style:family="paragraph" style:parent-style-name="Standard">
      <style:text-properties fo:language="en" fo:country="US" fo:font-style="normal" fo:font-weight="normal" officeooo:rsid="005f9e1d" officeooo:paragraph-rsid="005f9e1d" style:font-style-asian="normal" style:font-weight-asian="normal" style:font-style-complex="normal" style:font-weight-complex="normal" text:display="none"/>
    </style:style>
    <style:style style:name="P82" style:family="paragraph" style:parent-style-name="Text_20_body">
      <style:text-properties fo:language="en" fo:country="US"/>
    </style:style>
    <style:style style:name="P83" style:family="paragraph" style:parent-style-name="Text_20_body">
      <style:text-properties fo:language="en" fo:country="US" officeooo:rsid="0072a0d9" officeooo:paragraph-rsid="0072a0d9"/>
    </style:style>
    <style:style style:name="P84" style:family="paragraph" style:parent-style-name="Text_20_body">
      <style:text-properties fo:language="en" fo:country="US" officeooo:paragraph-rsid="0072a0d9"/>
    </style:style>
    <style:style style:name="P85" style:family="paragraph" style:parent-style-name="Text_20_body">
      <style:text-properties fo:language="en" fo:country="US" fo:background-color="#ffff00"/>
    </style:style>
    <style:style style:name="T1" style:family="text">
      <style:text-properties officeooo:rsid="00858895"/>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4dafd3"/>
    </style:style>
    <style:style style:name="T5" style:family="text">
      <style:text-properties officeooo:rsid="004de923"/>
    </style:style>
    <style:style style:name="T6" style:family="text">
      <style:text-properties fo:background-color="#ffff00" loext:char-shading-value="0"/>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56812d" style:font-weight-asian="normal" style:font-weight-complex="normal"/>
    </style:style>
    <style:style style:name="T10" style:family="text">
      <style:text-properties fo:language="en" fo:country="US" officeooo:rsid="0056812d"/>
    </style:style>
    <style:style style:name="T11" style:family="text">
      <style:text-properties fo:language="en" fo:country="US" fo:font-weight="normal" officeooo:rsid="00575c9c" style:font-weight-asian="normal" style:font-weight-complex="normal"/>
    </style:style>
    <style:style style:name="T12" style:family="text">
      <style:text-properties fo:language="en" fo:country="US" officeooo:rsid="00575c9c"/>
    </style:style>
    <style:style style:name="T13" style:family="text">
      <style:text-properties fo:font-weight="bold" officeooo:rsid="004de923" style:font-weight-asian="bold" style:font-weight-complex="bold"/>
    </style:style>
    <style:style style:name="T14" style:family="text">
      <style:text-properties fo:font-style="italic" officeooo:rsid="004de923"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officeooo:rsid="0056db3c"/>
    </style:style>
    <style:style style:name="T17" style:family="text">
      <style:text-properties officeooo:rsid="0058d818"/>
    </style:style>
    <style:style style:name="T18" style:family="text">
      <style:text-properties fo:language="en" fo:country="US" officeooo:rsid="00766fb9"/>
    </style:style>
    <style:style style:name="T19" style:family="text">
      <style:text-properties fo:language="en" fo:country="US" officeooo:rsid="005fd222"/>
    </style:style>
    <style:style style:name="T20" style:family="text">
      <style:text-properties fo:language="en" fo:country="US" officeooo:rsid="00604843"/>
    </style:style>
    <style:style style:name="T21" style:family="text">
      <style:text-properties fo:language="en" fo:country="US" officeooo:rsid="0061bbba"/>
    </style:style>
    <style:style style:name="T22" style:family="text">
      <style:text-properties fo:language="en" fo:country="US" officeooo:rsid="0055473a"/>
    </style:style>
    <style:style style:name="T23" style:family="text">
      <style:text-properties fo:language="en" fo:country="US" officeooo:rsid="0055d1b9"/>
    </style:style>
    <style:style style:name="T24" style:family="text">
      <style:text-properties fo:language="en" fo:country="US" officeooo:rsid="005a9d50"/>
    </style:style>
    <style:style style:name="T25" style:family="text">
      <style:text-properties officeooo:rsid="00305912"/>
    </style:style>
    <style:style style:name="T26" style:family="text">
      <style:text-properties officeooo:rsid="00679d38"/>
    </style:style>
    <style:style style:name="T27" style:family="text">
      <style:text-properties officeooo:rsid="00305912" fo:background-color="#ffff00" loext:char-shading-value="0"/>
    </style:style>
    <style:style style:name="T28" style:family="text">
      <style:text-properties officeooo:rsid="00679d38" fo:background-color="#ffff00" loext:char-shading-value="0"/>
    </style:style>
    <style:style style:name="T29" style:family="text">
      <style:text-properties officeooo:rsid="00624881"/>
    </style:style>
    <style:style style:name="T30" style:family="text">
      <style:text-properties fo:font-style="italic" officeooo:rsid="0037a465" style:font-style-asian="italic" style:font-style-complex="italic"/>
    </style:style>
    <style:style style:name="T31" style:family="text">
      <style:text-properties officeooo:rsid="0037a465"/>
    </style:style>
    <style:style style:name="T32" style:family="text">
      <style:text-properties officeooo:rsid="0065def2"/>
    </style:style>
    <style:style style:name="T33" style:family="text">
      <style:text-properties fo:font-style="italic" officeooo:rsid="00663b0b" style:font-style-asian="italic" style:font-style-complex="italic"/>
    </style:style>
    <style:style style:name="T34" style:family="text">
      <style:text-properties fo:font-style="italic" officeooo:rsid="0065def2" style:font-style-asian="italic" style:font-style-complex="italic"/>
    </style:style>
    <style:style style:name="T35" style:family="text">
      <style:text-properties fo:font-style="italic" officeooo:rsid="00679d38" style:font-style-asian="italic" style:font-style-complex="italic"/>
    </style:style>
    <style:style style:name="T36" style:family="text">
      <style:text-properties fo:font-style="italic" officeooo:rsid="00679d38" fo:background-color="#ffff00" loext:char-shading-value="0" style:font-style-asian="italic" style:font-style-complex="italic"/>
    </style:style>
    <style:style style:name="T37" style:family="text">
      <style:text-properties fo:font-style="italic" officeooo:rsid="006d954d" fo:background-color="#ffff00" loext:char-shading-value="0" style:font-style-asian="italic" style:font-style-complex="italic"/>
    </style:style>
    <style:style style:name="T38" style:family="text">
      <style:text-properties fo:font-style="normal" style:font-style-asian="normal" style:font-style-complex="normal"/>
    </style:style>
    <style:style style:name="T39" style:family="text">
      <style:text-properties fo:font-family="Consolas" style:font-family-generic="modern" style:font-pitch="fixed"/>
    </style:style>
    <style:style style:name="T40" style:family="text">
      <style:text-properties fo:font-family="Consolas" style:font-family-generic="modern" style:font-pitch="fixed" fo:font-size="10pt" style:font-size-asian="10pt" style:font-size-complex="10pt"/>
    </style:style>
    <style:style style:name="T41" style:family="text">
      <style:text-properties officeooo:rsid="0036d4b9"/>
    </style:style>
    <style:style style:name="T42" style:family="text">
      <style:text-properties officeooo:rsid="0019bf88"/>
    </style:style>
    <style:style style:name="T43" style:family="text">
      <style:text-properties officeooo:rsid="0050ece2"/>
    </style:style>
    <style:style style:name="T44" style:family="text">
      <style:text-properties officeooo:rsid="003118ee"/>
    </style:style>
    <style:style style:name="T45" style:family="text">
      <style:text-properties fo:font-style="italic" officeooo:rsid="003118ee" style:font-style-asian="italic" style:font-style-complex="italic"/>
    </style:style>
    <style:style style:name="T46" style:family="text">
      <style:text-properties fo:font-style="normal" officeooo:rsid="003118ee" style:font-style-asian="normal" style:font-style-complex="normal"/>
    </style:style>
    <style:style style:name="T47" style:family="text">
      <style:text-properties fo:font-style="normal" officeooo:rsid="0050ece2" style:font-style-asian="normal" style:font-style-complex="normal"/>
    </style:style>
    <style:style style:name="T48" style:family="text">
      <style:text-properties officeooo:rsid="0019bf88" fo:background-color="#ffff00" loext:char-shading-value="0"/>
    </style:style>
    <style:style style:name="T49" style:family="text">
      <style:text-properties fo:font-weight="bold" officeooo:rsid="005116f4" style:font-weight-asian="bold" style:font-weight-complex="bold"/>
    </style:style>
    <style:style style:name="T50" style:family="text">
      <style:text-properties officeooo:rsid="001a422f"/>
    </style:style>
    <style:style style:name="T51" style:family="text">
      <style:text-properties fo:font-style="normal" officeooo:rsid="002a8e8b"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officeooo:rsid="003918a6" style:font-style-asian="normal" style:font-style-complex="normal"/>
    </style:style>
    <style:style style:name="T55" style:family="text">
      <style:text-properties fo:font-style="normal" officeooo:rsid="0068b4e6" style:font-style-asian="normal" style:font-style-complex="normal"/>
    </style:style>
    <style:style style:name="T56" style:family="text">
      <style:text-properties fo:font-style="normal" fo:font-weight="normal" officeooo:rsid="002c8ce7" style:font-style-asian="normal" style:font-weight-asian="normal" style:font-style-complex="normal" style:font-weight-complex="normal"/>
    </style:style>
    <style:style style:name="T57" style:family="text">
      <style:text-properties officeooo:rsid="0037c597"/>
    </style:style>
    <style:style style:name="T58" style:family="text">
      <style:text-properties officeooo:rsid="002c8ce7"/>
    </style:style>
    <style:style style:name="T59" style:family="text">
      <style:text-properties officeooo:rsid="003ca4e3"/>
    </style:style>
    <style:style style:name="T60" style:family="text">
      <style:text-properties officeooo:rsid="003918a6"/>
    </style:style>
    <style:style style:name="T61" style:family="text">
      <style:text-properties officeooo:rsid="001e6888"/>
    </style:style>
    <style:style style:name="T62" style:family="text">
      <style:text-properties fo:font-weight="bold" officeooo:rsid="00539843" style:font-weight-asian="bold" style:font-weight-complex="bold"/>
    </style:style>
    <style:style style:name="T63" style:family="text">
      <style:text-properties officeooo:rsid="00539843"/>
    </style:style>
    <style:style style:name="T64" style:family="text">
      <style:text-properties officeooo:rsid="0054a3ea"/>
    </style:style>
    <style:style style:name="T65" style:family="text">
      <style:text-properties officeooo:rsid="00418ca8"/>
    </style:style>
    <style:style style:name="T66" style:family="text">
      <style:text-properties officeooo:rsid="005ab38f"/>
    </style:style>
    <style:style style:name="T67" style:family="text">
      <style:text-properties fo:font-style="italic" officeooo:rsid="005ab38f" style:font-style-asian="italic" style:font-style-complex="italic"/>
    </style:style>
    <style:style style:name="T68" style:family="text">
      <style:text-properties fo:color="#000000" loext:opacity="100%" style:font-name="Consolas" fo:font-size="11pt" officeooo:rsid="005a5f98" style:font-size-asian="11pt"/>
    </style:style>
    <style:style style:name="T69" style:family="text">
      <style:text-properties fo:color="#000000" loext:opacity="100%" style:font-name="Consolas" fo:font-size="11pt" style:font-size-asian="11pt"/>
    </style:style>
    <style:style style:name="T70" style:family="text">
      <style:text-properties officeooo:rsid="0078876c"/>
    </style:style>
    <style:style style:name="T71" style:family="text">
      <style:text-properties fo:language="en" fo:country="US" officeooo:rsid="0079e2ee"/>
    </style:style>
    <style:style style:name="T72" style:family="text">
      <style:text-properties officeooo:rsid="0083cf8c"/>
    </style:style>
    <style:style style:name="T73" style:family="text">
      <style:text-properties officeooo:rsid="0072a9ec"/>
    </style:style>
    <style:style style:name="T74" style:family="text">
      <style:text-properties officeooo:rsid="00742ff7"/>
    </style:style>
    <style:style style:name="T75" style:family="text">
      <style:text-properties fo:font-style="italic" officeooo:rsid="0072a9ec" style:font-style-asian="italic" style:font-style-complex="italic"/>
    </style:style>
    <style:style style:name="T76" style:family="text">
      <style:text-properties officeooo:rsid="008274e2"/>
    </style:style>
    <style:style style:name="T77" style:family="text">
      <style:text-properties officeooo:rsid="005cb03f"/>
    </style:style>
    <style:style style:name="T78" style:family="text">
      <style:text-properties officeooo:rsid="0072a0d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tup Guide OpenVPN Master branch</text:p>
      <text:p text:style-name="P2">Version 0.<text:span text:style-name="T1">7</text:span></text:p>
      <text:p text:style-name="P3">Latest guide: <text:a xlink:type="simple" xlink:href="https://raw.githubusercontent.com/egc112/OpenWRT-egc-add-on/main/notes/openwrt%20openvpn%20setup%20guide%20master%20branch.pdf" text:style-name="Internet_20_link" text:visited-style-name="Visited_20_Internet_20_Link">OpenVPN setup guide Master branch</text:a></text:p>
      <text:p text:style-name="P3"/>
      <text:p text:style-name="P2"/>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2456_2247818710" office:name="Introduction" text:style-name="Index_20_Link" text:visited-style-name="Index_20_Link">Introduction<text:tab/>1</text:a></text:p>
          <text:p text:style-name="P4"><text:a xlink:type="simple" xlink:href="#__RefHeading___Toc566_2988890307" office:name="Installation" text:style-name="Index_20_Link" text:visited-style-name="Index_20_Link">Installation<text:tab/>1</text:a></text:p>
          <text:p text:style-name="P5"><text:a xlink:type="simple" xlink:href="#__RefHeading___Toc3542_1636345598" office:name="Prerequisites" text:style-name="Index_20_Link" text:visited-style-name="Index_20_Link">Prerequisites<text:tab/>1</text:a></text:p>
          <text:p text:style-name="P5"><text:a xlink:type="simple" xlink:href="#__RefHeading___Toc3930_2988890307" office:name="Prerequistes for an OpenVPN Server" text:style-name="Index_20_Link" text:visited-style-name="Index_20_Link">Prerequistes for an OpenVPN Server<text:tab/>1</text:a></text:p>
          <text:p text:style-name="P6"><text:a xlink:type="simple" xlink:href="#__RefHeading___Toc4036_3639012204" office:name="Check all involved subnets" text:style-name="Index_20_Link" text:visited-style-name="Index_20_Link">Check all involved subnets<text:tab/>2</text:a></text:p>
          <text:p text:style-name="P6"><text:a xlink:type="simple" xlink:href="#__RefHeading___Toc4038_3639012204" office:name="Check for Public IP address" text:style-name="Index_20_Link" text:visited-style-name="Index_20_Link">Check for Public IP address<text:tab/>2</text:a></text:p>
          <text:p text:style-name="P6"><text:a xlink:type="simple" xlink:href="#__RefHeading___Toc4040_3639012204" office:name="Test from outside" text:style-name="Index_20_Link" text:visited-style-name="Index_20_Link">Test from outside<text:tab/>2</text:a></text:p>
          <text:p text:style-name="P4"><text:a xlink:type="simple" xlink:href="#__RefHeading___Toc867_2988890307" office:name="Using Config File" text:style-name="Index_20_Link" text:visited-style-name="Index_20_Link">Using Config File<text:tab/>2</text:a></text:p>
          <text:p text:style-name="P4"><text:a xlink:type="simple" xlink:href="#__RefHeading___Toc2458_2247818710" office:name="Setup Interface" text:style-name="Index_20_Link" text:visited-style-name="Index_20_Link">Setup Interface<text:tab/>4</text:a></text:p>
          <text:p text:style-name="P4"><text:a xlink:type="simple" xlink:href="#__RefHeading___Toc7691_2247818710" office:name="Setup Firewall" text:style-name="Index_20_Link" text:visited-style-name="Index_20_Link">Setup Firewall<text:tab/>8</text:a></text:p>
          <text:p text:style-name="P5"><text:a xlink:type="simple" xlink:href="#__RefHeading___Toc10466_2247818710" office:name="OpenVPN Client" text:style-name="Index_20_Link" text:visited-style-name="Index_20_Link">OpenVPN Client<text:tab/>8</text:a></text:p>
          <text:p text:style-name="P5"><text:a xlink:type="simple" xlink:href="#__RefHeading___Toc10468_2247818710" office:name="OpenVPN Server" text:style-name="Index_20_Link" text:visited-style-name="Index_20_Link">OpenVPN Server<text:tab/>9</text:a></text:p>
          <text:p text:style-name="P4"><text:a xlink:type="simple" xlink:href="#__RefHeading___Toc1218_538221769" office:name="Status" text:style-name="Index_20_Link" text:visited-style-name="Index_20_Link">Status<text:tab/>9</text:a></text:p>
          <text:p text:style-name="P4"><text:a xlink:type="simple" xlink:href="#__RefHeading___Toc1220_538221769" office:name="Management interface" text:style-name="Index_20_Link" text:visited-style-name="Index_20_Link">Management interface<text:tab/>9</text:a></text:p>
          <text:p text:style-name="P4"><text:a xlink:type="simple" xlink:href="#__RefHeading___Toc568_2988890307" office:name="Problems" text:style-name="Index_20_Link" text:visited-style-name="Index_20_Link">Problems<text:tab/>10</text:a></text:p>
          <text:p text:style-name="P4"><text:a xlink:type="simple" xlink:href="#__RefHeading___Toc1027_1514842745" office:name="Addendum 1 Script to convert config to uci" text:style-name="Index_20_Link" text:visited-style-name="Index_20_Link">Addendum 1 Script to convert config to uci<text:tab/>11</text:a></text:p>
        </text:index-body>
      </text:table-of-content>
      <text:p text:style-name="P2"/>
      <text:h text:style-name="P7" text:outline-level="1"><text:bookmark-start text:name="__RefHeading___Toc2456_2247818710"/>Introduction<text:bookmark-end text:name="__RefHeading___Toc2456_2247818710"/></text:h>
      <text:p text:style-name="P8">On master branch <text:span text:style-name="T2">luci-app-openvpn</text:span> is replaced by <text:span text:style-name="T2">luci-proto-openvpn</text:span>.</text:p>
      <text:p text:style-name="P8">There is no longer a separate entry in the GUI for OpenVPN but it has become a protocol so it is integrated in the interface.</text:p>
      <text:p text:style-name="P9">The whole interface and inner working are redesigned so this guide is only applicable for <text:span text:style-name="T3">Master branch</text:span> as 25.12 and earlier branches use the old style luci-app-openvpn</text:p>
      <text:p text:style-name="P8"/>
      <text:p text:style-name="P10">This guide and also the OpenVPN implementation is very much a Work in Progress and subject to change.</text:p>
      <text:p text:style-name="P10"/>
      <text:h text:style-name="P7" text:outline-level="1"><text:bookmark-start text:name="__RefHeading___Toc566_2988890307"/>Installation<text:bookmark-end text:name="__RefHeading___Toc566_2988890307"/></text:h>
      <text:p text:style-name="P9">If you do not have OpenVPN installed at all then install by first <text:span text:style-name="T4">by u</text:span>pdating APK and then installing <text:span text:style-name="T2">openvpn‑openssl</text:span> and <text:span text:style-name="T2">luci-proto-openvpn</text:span></text:p>
      <text:p text:style-name="P9"/>
      <text:h text:style-name="P11" text:outline-level="2"><text:bookmark-start text:name="__RefHeading___Toc3542_1636345598"/>Prerequisite<text:span text:style-name="T5">s</text:span><text:bookmark-end text:name="__RefHeading___Toc3542_1636345598"/></text:h>
      <text:p text:style-name="P12">A fully functioning router with the correct time.</text:p>
      <text:p text:style-name="P12"/>
      <text:h text:style-name="P13" text:outline-level="2"><text:bookmark-start text:name="__RefHeading___Toc3930_2988890307"/>Prerequistes for an OpenVPN <text:span text:style-name="T6">Server</text:span><text:bookmark-end text:name="__RefHeading___Toc3930_2988890307"/></text:h>
      <text:p text:style-name="P14"><text:span text:style-name="T7">Skip</text:span><text:span text:style-name="T8"> this </text:span><text:span text:style-name="T9">paragraph</text:span><text:span text:style-name="T8"> for setting up an </text:span><text:span text:style-name="T7">OpenVPN </text:span><text:span text:style-name="T10">C</text:span><text:span text:style-name="T7">lient</text:span><text:span text:style-name="T8"> </text:span><text:span text:style-name="T11">and </text:span><text:span text:style-name="T12">continue</text:span><text:span text:style-name="T11"> to </text:span><text:a xlink:type="simple" xlink:href="#Using Config File|outline" text:style-name="Internet_20_link" text:visited-style-name="Visited_20_Internet_20_Link"><text:span text:style-name="T12">Using Config File</text:span></text:a></text:p>
      <text:h text:style-name="P15" text:outline-level="3"><text:bookmark-start text:name="__RefHeading___Toc4036_3639012204"/><text:soft-page-break/>Check all involved subnets<text:bookmark-end text:name="__RefHeading___Toc4036_3639012204"/></text:h>
      <text:p text:style-name="P16"><text:span text:style-name="T5">For setting up an OpenVPN </text:span><text:span text:style-name="T13">tun</text:span><text:span text:style-name="T5"> server</text:span> <text:span text:style-name="T6">all three involved subnets have to be different and non overlapping</text:span>. So the routers subnet, the <text:span text:style-name="T5">OpenVPN</text:span> subnet and the Clients subnet all have to be different.</text:p>
      <text:p text:style-name="P17">As you often cannot choose the subnet of the <text:span text:style-name="T5">OpenVPN</text:span> client, it is best to <text:span text:style-name="T3">avoid</text:span> using frequently used subnets for your router e.g. <text:span text:style-name="T2">192.168.1.1/24</text:span> or <text:span text:style-name="T2">192.168.0.1/24</text:span> but if you cannot easily change the routers subnet then leave it and hope for the best.</text:p>
      <text:p text:style-name="P17">For the <text:span text:style-name="T5">OpenVPN</text:span> subnet <text:span text:style-name="T2">172.2</text:span><text:span text:style-name="T14">3</text:span><text:span text:style-name="T2">.2</text:span><text:span text:style-name="T14">3</text:span><text:span text:style-name="T2">.1/24</text:span> is chosen in this example which is not often used.</text:p>
      <text:p text:style-name="P16"/>
      <text:h text:style-name="P18" text:outline-level="3"><text:bookmark text:name="_toc99"/><text:bookmark-start text:name="__RefHeading___Toc4038_3639012204"/>Check for Public IP address<text:bookmark-end text:name="__RefHeading___Toc4038_3639012204"/></text:h>
      <text:p text:style-name="P16">To be able to connect from outside, your router must have a public IP address (either IPv4 and/or IPv6). </text:p>
      <text:p text:style-name="P16">Check if your router has a proper Public IPv4 address with (from command line): </text:p>
      <text:p text:style-name="P19">ifstatus wan | grep address </text:p>
      <text:p text:style-name="P17"/>
      <text:p text:style-name="P20"><text:span text:style-name="T7">A public IP address does </text:span><text:span text:style-name="T15">not</text:span><text:span text:style-name="T7"> start with 192.168.X.X, 10.X.X.X, 172.16-31.X.X or a </text:span><text:a xlink:type="simple" xlink:href="https://en.wikipedia.org/wiki/Carrier-grade_NAT" text:style-name="Internet_20_link" text:visited-style-name="Visited_20_Internet_20_Link"><text:span text:style-name="Internet_20_link"><text:span text:style-name="T7">CGNAT address</text:span></text:span></text:a><text:span text:style-name="T7"> (IP addresses from 100.64.0.0 to 100.127.255.255 )</text:span></text:p>
      <text:p text:style-name="P16"/>
      <text:p text:style-name="P16">Another way to test is to compare the routers IP address (<text:span text:style-name="T2">ifstatus wan | grep address )</text:span> with the address from <text:span text:style-name="T2">ipleak.net</text:span> it should show the same address for a Public IPv4 address. If it is not the same you might not have a Public IPv4 address and the router is not reachable with IPv4.</text:p>
      <text:p text:style-name="P17"/>
      <text:p text:style-name="P17">If your router is behind another router then: </text:p>
      <text:list text:style-name="WWNum3">
        <text:list-item>
          <text:p text:style-name="P21">Check if that router has a Public IP address.</text:p>
        </text:list-item>
        <text:list-item>
          <text:p text:style-name="P21">Check if and how you can Port Forward from that router to your router which is going to run the <text:span text:style-name="T5">OpenVPN</text:span> Server.</text:p>
        </text:list-item>
      </text:list>
      <text:p text:style-name="P16"/>
      <text:p text:style-name="P17">If you are behind CGNAT, <text:span text:style-name="T16">so do not have a public IPv4 address </text:span>and do not have <text:span text:style-name="T16">a public </text:span>IPv6 <text:span text:style-name="T17">address </text:span>(<text:span text:style-name="T16">check with: </text:span><text:span text:style-name="T2">ifstatus wan6</text:span>) or using IPv6 is not applicable then you have to involve a <text:span text:style-name="T16">commercial </text:span>third party to get a public IP address. </text:p>
      <text:p text:style-name="P20"><text:span text:style-name="T7">This can be a VPN provider which supports port forwarding (e.g. </text:span><text:span text:style-name="T18">AirVPN, </text:span><text:span text:style-name="T7">ProtonVPN), or you can rent a Virt</text:span><text:span text:style-name="T19">u</text:span><text:span text:style-name="T7">al Private Server ( I have an Oracle VPS which can be had for free, see at the bottom of this guide), or use things like </text:span><text:a xlink:type="simple" xlink:href="https://netbird.io/" text:style-name="Internet_20_link" text:visited-style-name="Visited_20_Internet_20_Link"><text:span text:style-name="Internet_20_link"><text:span text:style-name="T7">Netbird</text:span></text:span></text:a><text:span text:style-name="T7">, </text:span><text:a xlink:type="simple" xlink:href="https://openwrt.org/docs/guide-user/services/vpn/zerotier" text:style-name="Internet_20_link" text:visited-style-name="Visited_20_Internet_20_Link"><text:span text:style-name="Internet_20_link"><text:span text:style-name="T7">Zerotier</text:span></text:span></text:a><text:span text:style-name="T7">, </text:span><text:a xlink:type="simple" xlink:href="https://openwrt.org/docs/guide-user/services/vpn/cloudfare_tunnel" text:style-name="Internet_20_link" text:visited-style-name="Visited_20_Internet_20_Link"><text:span text:style-name="Internet_20_link"><text:span text:style-name="T7">Cloudflared</text:span></text:span></text:a><text:span text:style-name="T7">, </text:span><text:a xlink:type="simple" xlink:href="https://openwrt.org/docs/guide-user/services/vpn/tailscale/start" text:style-name="Internet_20_link" text:visited-style-name="Visited_20_Internet_20_Link"><text:span text:style-name="Internet_20_link"><text:span text:style-name="T7">Tailscale</text:span></text:span></text:a><text:span text:style-name="Internet_20_link"><text:span text:style-name="T7">,</text:span></text:span><text:span text:style-name="T7"> </text:span><text:a xlink:type="simple" xlink:href="https://ngrok.com/" text:style-name="Internet_20_link" text:visited-style-name="Visited_20_Internet_20_Link"><text:span text:style-name="Internet_20_link"><text:span text:style-name="T7">ngrok</text:span></text:span></text:a><text:span text:style-name="Internet_20_link"><text:span text:style-name="T7">,</text:span></text:span><text:span text:style-name="T7"> </text:span><text:a xlink:type="simple" xlink:href="https://pinggy.io/blog/how_to_set_up_port_forwarding_even_behind_cgnat/" text:style-name="Internet_20_link" text:visited-style-name="Visited_20_Internet_20_Link"><text:span text:style-name="T20">pinggy</text:span></text:a><text:span text:style-name="T20">, </text:span><text:span text:style-name="T21">or</text:span><text:span text:style-name="T20"> </text:span><text:a xlink:type="simple" xlink:href="https://softwareengineeringstandard.com/2025/07/12/cgnat-port-forwarding/" text:style-name="Internet_20_link" text:visited-style-name="Visited_20_Internet_20_Link"><text:span text:style-name="T20">tunnelmole</text:span></text:a><text:span text:style-name="T20"> </text:span><text:span text:style-name="T7">and there are more, </text:span><text:span text:style-name="T22">I have setup Netbird on several OpenWRT and Windows and Linux client</text:span><text:span text:style-name="T23">s</text:span><text:span text:style-name="T22"> and it works well, see my notes </text:span><text:a xlink:type="simple" xlink:href="https://raw.githubusercontent.com/egc112/OpenWRT-egc-add-on/main/notes/OpenWRT%20Netbird.pdf" text:style-name="Internet_20_link" text:visited-style-name="Visited_20_Internet_20_Link"><text:span text:style-name="T22">about setting up Netbird on OpenWRT</text:span></text:a><text:span text:style-name="T22"> </text:span><text:span text:style-name="T24">and the </text:span><text:a xlink:type="simple" xlink:href="https://forum.openwrt.org/t/netbird-support-discussion-thread/237831" text:style-name="Internet_20_link" text:visited-style-name="Visited_20_Internet_20_Link"><text:span text:style-name="T24">Netbird support thread</text:span></text:a><text:span text:style-name="T7">.</text:span></text:p>
      <text:p text:style-name="P17"/>
      <text:p text:style-name="P22"><text:span text:style-name="T7">If your Public IP address is non static, e.g. it can change, then look into using </text:span><text:a xlink:type="simple" xlink:href="https://openwrt.org/docs/guide-user/services/ddns/client" text:style-name="Internet_20_link" text:visited-style-name="Visited_20_Internet_20_Link"><text:span text:style-name="Internet_20_link"><text:span text:style-name="T7">DDNS</text:span></text:span></text:a><text:span text:style-name="T7">.</text:span></text:p>
      <text:p text:style-name="P17"/>
      <text:h text:style-name="P15" text:outline-level="3"><text:bookmark-start text:name="__RefHeading___Toc4040_3639012204"/>Test from outside<text:bookmark-end text:name="__RefHeading___Toc4040_3639012204"/></text:h>
      <text:p text:style-name="P16">Proper <text:span text:style-name="T6">testing</text:span> can only be done <text:span text:style-name="T6">from outside</text:span> e.g. with your phone or laptop on cellular data or from a friends/neighbors internet.</text:p>
      <text:p text:style-name="P17"/>
      <text:h text:style-name="P7" text:outline-level="1"><text:bookmark-start text:name="__RefHeading___Toc867_2988890307"/>Using Config File<text:bookmark-end text:name="__RefHeading___Toc867_2988890307"/></text:h>
      <text:p text:style-name="P23"><text:span text:style-name="T25">W</text:span>hen using <text:span text:style-name="T25">your own</text:span> config file <text:span text:style-name="T25">to setup </text:span><text:span text:style-name="T26">an </text:span><text:span text:style-name="T27">OpenVPN </text:span><text:span text:style-name="T28">Client</text:span><text:span text:style-name="T26"> </text:span><text:span text:style-name="T29">set</text:span> <text:span text:style-name="T6">script-security 2</text:span></text:p>
      <text:p text:style-name="P24">(If you use the GUI for complete setup then let it be default (3) and then the hotplug scripts will do the whole setup.)</text:p>
      <text:p text:style-name="P25"><draw:frame draw:style-name="fr1" draw:name="Image6" text:anchor-type="as-char" svg:width="18.461cm" svg:height="3.263cm" draw:z-index="6"><draw:image xlink:href="Pictures/10000001000003B6000000A8F90AF2BC.png" xlink:type="simple" xlink:show="embed" xlink:actuate="onLoad" draw:mime-type="image/png"/></draw:frame></text:p>
      <text:p text:style-name="P25"/>
      <text:p text:style-name="P26">This will allow you to setup the VPN tunnel to you own liking</text:p>
      <text:p text:style-name="P26"/>
      <text:p text:style-name="P26"><text:soft-page-break/><text:span text:style-name="T2">/</text:span><text:span text:style-name="T30">var/run/openvpn.openvpn_client.conf</text:span><text:span text:style-name="T31">:</text:span></text:p>
      <text:p text:style-name="P27">cd /etc/openvpn/openvpn_client </text:p>
      <text:p text:style-name="P27">status /var/run/openvpn.openvpn_client.status </text:p>
      <text:p text:style-name="P27">syslog openvpn_openvpn_client </text:p>
      <text:p text:style-name="P27">tmp-dir /tmp </text:p>
      <text:p text:style-name="P27">script-security 2 </text:p>
      <text:p text:style-name="P27">dev tun1 </text:p>
      <text:p text:style-name="P27">dev-type tun </text:p>
      <text:p text:style-name="P27">mtu-disc no </text:p>
      <text:p text:style-name="P27">config '/etc/openvpn/openvpn_client/openvpn_client_config.cfg'</text:p>
      <text:p text:style-name="P27"/>
      <text:p text:style-name="P28"/>
      <text:p text:style-name="P28">If you leave the script security at its default which is 3 then the hotplug script will set everything up for you. This reads the variables from the OpenVPN environment so <text:span text:style-name="T32">it will setup a tunnel</text:span> with a config file but <text:span text:style-name="T32">no routing is setup as </text:span><text:span text:style-name="T33">route-</text:span><text:span text:style-name="T34">noexec</text:span><text:span text:style-name="T32"> is added to the config file.</text:span></text:p>
      <text:p text:style-name="P29"/>
      <text:p text:style-name="P30">For an <text:span text:style-name="T6">OpenVPN Server</text:span> you could try and leave the <text:span text:style-name="T6">script-security 3 </text:span>as that will show traffic on the interface but you can not set routes via the script but for a simple setup this could work.</text:p>
      <text:p text:style-name="P28"/>
      <text:p text:style-name="P31"><text:span text:style-name="T2">/</text:span><text:span text:style-name="T30">var/run/openvpn.openvpn_client.conf </text:span><text:span text:style-name="T35">with </text:span><text:span text:style-name="T36">script-se</text:span><text:span text:style-name="T37">c</text:span><text:span text:style-name="T36">urity 3</text:span><text:span text:style-name="T31">:</text:span></text:p>
      <text:p text:style-name="P32">cd /etc/openvpn/openvpn_client </text:p>
      <text:p text:style-name="P32">status /var/run/openvpn.openvpn_client.status </text:p>
      <text:p text:style-name="P32">syslog openvpn_openvpn_client </text:p>
      <text:p text:style-name="P32">tmp-dir /tmp </text:p>
      <text:p text:style-name="P32">script-security 3 </text:p>
      <text:p text:style-name="P32">dev tun1 </text:p>
      <text:p text:style-name="P32">dev-type tun </text:p>
      <text:p text:style-name="P32">mtu-disc no </text:p>
      <text:p text:style-name="P32">config '/etc/openvpn/openvpn_client/openvpn_client_config.cfg' </text:p>
      <text:p text:style-name="P32">setenv INTERFACE openvpn_client </text:p>
      <text:p text:style-name="P32">script-security 3 </text:p>
      <text:p text:style-name="P32">setenv IPV6 '1' </text:p>
      <text:p text:style-name="P33">ifconfig-noexec </text:p>
      <text:p text:style-name="P33">route-noexec </text:p>
      <text:p text:style-name="P32">up '/usr/libexec/openvpn-hotplug' </text:p>
      <text:p text:style-name="P32">down '/usr/libexec/openvpn-hotplug' </text:p>
      <text:p text:style-name="P32">route-up '/usr/libexec/openvpn-hotplug' </text:p>
      <text:p text:style-name="P32">route-pre-down '/usr/libexec/openvpn-hotplug' </text:p>
      <text:p text:style-name="P32">tls-crypt-v2-verify '/usr/libexec/openvpn-hotplug'</text:p>
      <text:p text:style-name="P29"/>
      <text:p text:style-name="P29"/>
      <text:p text:style-name="P34">Even if you use the config file it will work to some extent when setting script security to 3 as it still reads from the config file. So you can use a hybrid setup.</text:p>
      <text:p text:style-name="P34"/>
      <text:p text:style-name="P34">When using the GUI to setup, you can use the config file to add options not in the GUI e.g. <text:span text:style-name="T2">pull-filter ignore "redirect-gateway ipv6"</text:span> or <text:span text:style-name="T2">remote-random</text:span><text:span text:style-name="T38"> etc.</text:span></text:p>
      <text:p text:style-name="P35"/>
      <text:p text:style-name="P36"><text:span text:style-name="T6">Do not use any compression settings</text:span> even loading the compression stub, e.g. '<text:span text:style-name="T39">comp­-lzo no</text:span><text:span text:style-name="T40">',</text:span> will result in an error.</text:p>
      <text:h text:style-name="P37" text:outline-level="1"><text:bookmark-start text:name="__RefHeading___Toc2458_2247818710"/>Setup <text:span text:style-name="T41">I</text:span>nterface<text:bookmark-end text:name="__RefHeading___Toc2458_2247818710"/></text:h>
      <text:p text:style-name="P38">To setup OpenVPN (whether client or server)</text:p>
      <text:p text:style-name="P39">Network &gt; Interfaces &gt; Add new interface</text:p>
      <text:p text:style-name="P38"><text:span text:style-name="T42">Name: choose a name not more than 15 characters, </text:span><text:span text:style-name="T43">I </text:span><text:span text:style-name="T44">use </text:span><text:span text:style-name="T45">openvpn_client</text:span><text:span text:style-name="T46"> </text:span><text:span text:style-name="T47">in this example</text:span></text:p>
      <text:p text:style-name="P38"><text:span text:style-name="T48">Protocol: OpenVPN</text:span>.</text:p>
      <text:p text:style-name="P8"/>
      <text:p text:style-name="P8"><draw:frame draw:style-name="fr1" draw:name="Image1" text:anchor-type="as-char" svg:width="18.461cm" svg:height="2.549cm" draw:z-index="0"><draw:image xlink:href="Pictures/1000000100000789000000DC4727CA4F.png" xlink:type="simple" xlink:show="embed" xlink:actuate="onLoad" draw:mime-type="image/png"/></draw:frame></text:p>
      <text:p text:style-name="P8"/>
      <text:p text:style-name="P40">Click:</text:p>
      <text:p text:style-name="P40">Create interface</text:p>
      <text:p text:style-name="P40"/>
      <text:p text:style-name="P40">Now you can setup the OpenVPN interface</text:p>
      <text:p text:style-name="P40"><draw:frame draw:style-name="fr1" draw:name="Image2" text:anchor-type="as-char" svg:width="18.461cm" svg:height="6.574cm" draw:z-index="1"><draw:image xlink:href="Pictures/100000010000077B000002AAC76555BE.png" xlink:type="simple" xlink:show="embed" xlink:actuate="onLoad" draw:mime-type="image/png"/></draw:frame></text:p>
      <text:p text:style-name="P40"/>
      <text:p text:style-name="P40"/>
      <text:p text:style-name="P40"><text:span text:style-name="T49">I</text:span><text:span text:style-name="T3">mport your config file into the interface</text:span>.</text:p>
      <text:p text:style-name="P40">Click: Config File</text:p>
      <text:p text:style-name="P40"><draw:frame draw:style-name="fr1" draw:name="Image3" text:anchor-type="as-char" svg:width="18.461cm" svg:height="2.457cm" draw:z-index="2"><draw:image xlink:href="Pictures/10000001000003D000000082D0300425.png" xlink:type="simple" xlink:show="embed" xlink:actuate="onLoad" draw:mime-type="image/png"/></draw:frame></text:p>
      <text:p text:style-name="P40"/>
      <text:p text:style-name="P40"><text:soft-page-break/><text:span text:style-name="T50">Drag en drop your OpenVPN config file in the box</text:span><draw:frame draw:style-name="fr1" draw:name="Image4" text:anchor-type="as-char" svg:width="18.461cm" svg:height="7.973cm" draw:z-index="3"><draw:image xlink:href="Pictures/100000010000079200000345EFA32776.png" xlink:type="simple" xlink:show="embed" xlink:actuate="onLoad" draw:mime-type="image/png"/></draw:frame></text:p>
      <text:p text:style-name="P40"/>
      <text:p text:style-name="P41"/>
      <text:p text:style-name="P42">Config files can contain all necessary info <text:span text:style-name="T2">inline</text:span> including keys certificates and username and password as shown below</text:p>
      <text:p text:style-name="P40"><draw:frame draw:style-name="fr1" draw:name="Image5" text:anchor-type="as-char" svg:width="18.461cm" svg:height="21.421cm" draw:z-index="4"><draw:image xlink:href="Pictures/100000010000031E0000039E80F6A632.png" xlink:type="simple" xlink:show="embed" xlink:actuate="onLoad" draw:mime-type="image/png"/></draw:frame></text:p>
      <text:p text:style-name="P40"/>
      <text:p text:style-name="P43"><text:span text:style-name="T51">O</text:span><text:span text:style-name="T38">ften a config file just has </text:span><text:span text:style-name="T2">dev tun</text:span><text:span text:style-name="T38"> so without a number, in this case OpenVPN itself will use the first available number which is </text:span><text:span text:style-name="T52">0</text:span><text:span text:style-name="T38"> so the device will be </text:span><text:span text:style-name="T53">tun0</text:span></text:p>
      <text:p text:style-name="P44">I think this is bad practice and encourage you to choose a number for the device.</text:p>
      <text:p text:style-name="P44">I use <text:span text:style-name="T2">tun1</text:span> for my client and <text:span text:style-name="T2">tun2</text:span> for my server.</text:p>
      <text:p text:style-name="P45"/>
      <text:p text:style-name="P46">As is chosen to setup the tunnel with a config file with script-security 2 there is no information about the used <text:span text:style-name="T2">l3_device </text:span><text:span text:style-name="T38">(the </text:span><text:span text:style-name="T2">tun1</text:span><text:span text:style-name="T38"> device in this example) </text:span><text:span text:style-name="T54">to make sure applications which use the interface can </text:span><text:soft-page-break/><text:span text:style-name="T54">extract the l3_device <text:s/></text:span><text:span text:style-name="T55">(e.g. tun1) </text:span><text:span text:style-name="T54">from the config (e.g. for Policy Based Routing) also </text:span><text:span text:style-name="T56">add the device under Devices &gt; dev:</text:span></text:p>
      <text:p text:style-name="P47"><draw:frame draw:style-name="fr1" draw:name="Image9 Copy 1" text:anchor-type="as-char" svg:width="18.461cm" svg:height="3.014cm" draw:z-index="8"><draw:image xlink:href="Pictures/10000001000003EC000000A44B47C1AE.png" xlink:type="simple" xlink:show="embed" xlink:actuate="onLoad" draw:mime-type="image/png"/></draw:frame></text:p>
      <text:p text:style-name="P47"/>
      <text:p text:style-name="P47"/>
      <text:p text:style-name="P47">this way PBR wil now the device used by the openvpn_client interface</text:p>
      <text:p text:style-name="P45"/>
      <text:p text:style-name="P45"/>
      <text:p text:style-name="P45">/<text:span text:style-name="T57">etc/config/network/</text:span></text:p>
      <text:p text:style-name="P48">config interface 'openvpn_client'</text:p>
      <text:p text:style-name="P48"><text:tab/>option proto 'openvpn'</text:p>
      <text:p text:style-name="P48"><text:tab/>option dev_type 'tun'</text:p>
      <text:p text:style-name="P48"><text:tab/>option mtu_disc 'no'</text:p>
      <text:p text:style-name="P48"><text:tab/>option multipath 'off'</text:p>
      <text:p text:style-name="P48"><text:tab/>option config '/etc/openvpn/openvpn_client/openvpn_client_config.cfg'</text:p>
      <text:p text:style-name="P48"><text:tab/>option script_security '2'</text:p>
      <text:p text:style-name="P48"><text:tab/>option dev 'tun1'</text:p>
      <text:p text:style-name="P49"/>
      <text:h text:style-name="P37" text:outline-level="1"><text:bookmark-start text:name="__RefHeading___Toc7691_2247818710"/>Setup Firewall<text:bookmark-end text:name="__RefHeading___Toc7691_2247818710"/></text:h>
      <text:p text:style-name="P50"/>
      <text:h text:style-name="P11" text:outline-level="2"><text:bookmark-start text:name="__RefHeading___Toc10466_2247818710"/>OpenVPN Client<text:bookmark-end text:name="__RefHeading___Toc10466_2247818710"/></text:h>
      <text:p text:style-name="P51"><text:span text:style-name="T6"/></text:p>
      <text:p text:style-name="P52">Create a new firewall zone:</text:p>
      <text:p text:style-name="P52">Network &gt; Firewall &gt; Add</text:p>
      <text:p text:style-name="P52">Name: <text:tab/><text:tab/><text:span text:style-name="T3">vpn_client</text:span></text:p>
      <text:p text:style-name="P52">Input: <text:tab/><text:tab/><text:tab/><text:span text:style-name="T3">reject</text:span></text:p>
      <text:p text:style-name="P52">Output: <text:tab/><text:tab/><text:span text:style-name="T3">accept</text:span></text:p>
      <text:p text:style-name="P52">Intra zone forward:<text:tab/><text:span text:style-name="T3">reject</text:span></text:p>
      <text:p text:style-name="P52">IPv4 Masquerading:<text:tab/><text:span text:style-name="T3">Enabled</text:span> (ticked)</text:p>
      <text:p text:style-name="P52">MSS clamping:<text:tab/><text:span text:style-name="T3">Enabled</text:span> (ticked)</text:p>
      <text:p text:style-name="P53">Covered Networks: <text:span text:style-name="T58">none</text:span></text:p>
      <text:p text:style-name="P52">Allow forward from source zone<text:span text:style-name="T59">s</text:span>: <text:span text:style-name="T3">lan</text:span></text:p>
      <text:p text:style-name="P52"><draw:frame draw:style-name="fr1" draw:name="Image7" text:anchor-type="as-char" svg:width="18.461cm" svg:height="11.675cm" draw:z-index="5"><draw:image xlink:href="Pictures/1000000100000541000003BE951ACBD9.png" xlink:type="simple" xlink:show="embed" xlink:actuate="onLoad" draw:mime-type="image/png"/></draw:frame></text:p>
      <text:p text:style-name="P52"/>
      <text:p text:style-name="P54"><text:span text:style-name="T60">I</text:span>n this <text:span text:style-name="T60">example</text:span> I have adapte<text:span text:style-name="T61">d</text:span> my config file to use: <text:span text:style-name="T6">dev tun1</text:span></text:p>
      <text:p text:style-name="P55">As we have used script-security 2 and use our own config there is no device information available for the firewall to use so we have to add the device on the Advanced Settings tab under Covered devices:</text:p>
      <text:p text:style-name="P56"/>
      <text:p text:style-name="P57"><draw:frame draw:style-name="fr1" draw:name="Image8" text:anchor-type="as-char" svg:width="18.461cm" svg:height="4.313cm" draw:z-index="7"><draw:image xlink:href="Pictures/10000001000005620000014266583BE5.png" xlink:type="simple" xlink:show="embed" xlink:actuate="onLoad" draw:mime-type="image/png"/></draw:frame></text:p>
      <text:p text:style-name="P52"/>
      <text:p text:style-name="P58">For IPv6 also enable Masquerading IPv6 on the Advanced Settings Tab.</text:p>
      <text:p text:style-name="P58"/>
      <text:p text:style-name="P52"><text:span text:style-name="T3">/</text:span><text:span text:style-name="T62">etc/config/firewall</text:span><text:span text:style-name="T63">:</text:span></text:p>
      <text:p text:style-name="P27">config zone</text:p>
      <text:p text:style-name="P27"><text:tab/>option name 'vpn_client'</text:p>
      <text:p text:style-name="P27"><text:tab/>option input 'REJECT'</text:p>
      <text:p text:style-name="P27"><text:tab/>option output 'ACCEPT'</text:p>
      <text:p text:style-name="P27"><text:tab/>option forward 'REJECT'</text:p>
      <text:p text:style-name="P27"><text:tab/>option masq '1'</text:p>
      <text:p text:style-name="P27"><text:tab/>option mtu_fix '1'</text:p>
      <text:p text:style-name="P27"><text:tab/>option masq6 '1'</text:p>
      <text:p text:style-name="P27"><text:tab/>list device 'tun1'</text:p>
      <text:p text:style-name="P59"/>
      <text:p text:style-name="P27">config forwarding</text:p>
      <text:p text:style-name="P27"><text:tab/>option src 'lan'</text:p>
      <text:p text:style-name="P27"><text:tab/>option dest 'vpn_client'</text:p>
      <text:p text:style-name="P59"/>
      <text:p text:style-name="P52"/>
      <text:p text:style-name="P60">Alternatively you can add an extra interface with name: <text:span text:style-name="T2">tun1_client</text:span>, protocol: <text:span text:style-name="T2">unmanaged</text:span> and device: <text:span text:style-name="T2">tun1</text:span><text:line-break/>You can the use this interface <text:span text:style-name="T2">tun1_client </text:span>to add under Covered networks instead of adding the device under Covered devices</text:p>
      <text:p text:style-name="P52"/>
      <text:h text:style-name="P11" text:outline-level="2"><text:bookmark-start text:name="__RefHeading___Toc10468_2247818710"/>OpenVPN Server<text:bookmark-end text:name="__RefHeading___Toc10468_2247818710"/></text:h>
      <text:p text:style-name="P61">Open up firewall for the server port</text:p>
      <text:p text:style-name="P62"/>
      <text:p text:style-name="P61"><text:span text:style-name="T64">Create new zone vpn_server, </text:span>Allow Input, Output and Intra zone <text:span text:style-name="T65">f</text:span>orward</text:p>
      <text:p text:style-name="P61"/>
      <text:p text:style-name="P61">Allow from VPN to LAN , from VPN to WAN if you want internet for the connected clients and Allow from LAN to VPN if you want bidirectional traffic.</text:p>
      <text:p text:style-name="P61"/>
      <text:p text:style-name="P63"/>
      <text:h text:style-name="P7" text:outline-level="1"><text:bookmark-start text:name="__RefHeading___Toc1218_538221769"/>Status<text:bookmark-end text:name="__RefHeading___Toc1218_538221769"/></text:h>
      <text:p text:style-name="P64">View traffic with: <text:span text:style-name="T2">cat /var/run/openvpn.vpn_client.status </text:span><text:span text:style-name="T66"># replace </text:span><text:span text:style-name="T67">vpn_client</text:span><text:span text:style-name="T66"> with the name of your interface</text:span></text:p>
      <text:p text:style-name="P65">Resulting config: <text:span text:style-name="T2">/var/run/openvpn.&lt;interface-name&gt;.conf</text:span></text:p>
      <text:p text:style-name="P64"><text:span text:style-name="T38"/></text:p>
      <text:h text:style-name="P66" text:outline-level="1"><text:bookmark-start text:name="__RefHeading___Toc1220_538221769"/>Management interface<text:bookmark-end text:name="__RefHeading___Toc1220_538221769"/></text:h>
      <text:p text:style-name="P67"><text:span text:style-name="T68">#</text:span><text:span text:style-name="T69">Add to openvpn config for management </text:span></text:p>
      <text:p text:style-name="P68">management 127.0.0.1 14</text:p>
      <text:p text:style-name="P68">management-log-cache 100</text:p>
      <text:p text:style-name="P68"/>
      <text:p text:style-name="P67">#for viewing: `nc 127.0.0.1 14`</text:p>
      <text:h text:style-name="P7" text:outline-level="1"><text:bookmark-start text:name="__RefHeading___Toc568_2988890307"/><text:soft-page-break/>Problems<text:bookmark-end text:name="__RefHeading___Toc568_2988890307"/></text:h>
      <text:p text:style-name="P69">No host route to server</text:p>
      <text:p text:style-name="P70">When letting OpenWRT setup the routing via the hotplug scripts (script-security 3) there is no host route made, <text:span text:style-name="T70">problem in /usr/libexec/openvpn-hotplug</text:span></text:p>
      <text:p text:style-name="P71"><text:span text:style-name="T71">T</text:span><text:span text:style-name="T7">his is solved in commit:<text:line-break/></text:span><text:a xlink:type="simple" xlink:href="https://github.com/openwrt/packages/commit/c82ed824436d6e60569942673569285583a3e28b" text:style-name="Internet_20_link" text:visited-style-name="Visited_20_Internet_20_Link"><text:span text:style-name="T7">https://github.com/openwrt/packages/commit/c82ed824436d6e60569942673569285583a3e28b</text:span></text:a></text:p>
      <text:p text:style-name="P69">If you make an IPv6 connection to the host (server) then it only works if source routing is disabled on wan6.</text:p>
      <text:p text:style-name="P69">You can disable host routing if you add <text:span text:style-name="T72">in the network config file </text:span>the option:<text:line-break/><text:span text:style-name="T39">option nohostroute '1'</text:span></text:p>
      <text:p text:style-name="P69"/>
      <text:p text:style-name="P70"><text:span text:style-name="T73">T</text:span>he default route <text:span text:style-name="T73">is replaced </text:span>instead of using 128.0.0.0/1 and 0.0.0.0/1 <text:span text:style-name="T74">which</text:span><text:span text:style-name="T73"> cause</text:span><text:span text:style-name="T74">s</text:span><text:span text:style-name="T73"> no default rou</text:span><text:span text:style-name="T74">t</text:span><text:span text:style-name="T73">e being available when the tunnel is down and a whole </text:span><text:span text:style-name="T75">service network restart</text:span><text:span text:style-name="T73"> is then necessary</text:span></text:p>
      <text:p text:style-name="P70"/>
      <text:p text:style-name="P72">auth-user-pass is not working via the GUI, you can add it in the config <text:span text:style-name="T76">e.g.:</text:span></text:p>
      <text:p text:style-name="P73">option auth_user_pass ' /etc/openvpn/&lt;aut-user-pass-file&gt; '</text:p>
      <text:p text:style-name="P72">but once the GUI is saved it is gone again <text:span text:style-name="T76">a good alternative is to just add it to the openvpn conifg in the GUI:</text:span></text:p>
      <text:p text:style-name="P72"><draw:frame draw:style-name="fr1" draw:name="Image10" text:anchor-type="as-char" svg:width="9.435cm" svg:height="5.378cm" draw:z-index="9"><draw:image xlink:href="Pictures/100000010000027300000149E2003FBE.png" xlink:type="simple" xlink:show="embed" xlink:actuate="onLoad" draw:mime-type="image/png"/></draw:frame></text:p>
      <text:p text:style-name="P72"/>
      <text:p text:style-name="P73">Most other missing options e.g.</text:p>
      <text:p text:style-name="P74">pull_filter 'ignore "redirect-gateway ipv6'</text:p>
      <text:p text:style-name="P75">remote-random</text:p>
      <text:p text:style-name="P73">etc.</text:p>
      <text:p text:style-name="P73">Can also be added to the config file see above</text:p>
      <text:p text:style-name="P73"/>
      <text:p text:style-name="P73">The can also be set in the network config file like</text:p>
      <text:p text:style-name="P76">option pull_filter 'ignore "redirect-gateway ipv6'</text:p>
      <text:p text:style-name="P75">option remote_random '1'</text:p>
      <text:p text:style-name="P73"/>
      <text:p text:style-name="P73">But I have not found those in the GUI yet</text:p>
      <text:p text:style-name="P77"/>
      <text:p text:style-name="P77">OpenVPN can use a gateway although not per se necessary <text:span text:style-name="T73">but </text:span>the hotplug routing does not take that into account</text:p>
      <text:h text:style-name="P37" text:outline-level="1"><text:bookmark-start text:name="__RefHeading___Toc1027_1514842745"/>Addendum 1 Script to convert config to uci<text:bookmark-end text:name="__RefHeading___Toc1027_1514842745"/></text:h>
      <text:p text:style-name="P78"/>
      <text:p text:style-name="P78">#!/bin/sh<text:line-break/># ovpn2uci.sh — Convert an OpenVPN config file to OpenWrt UCI commands<text:line-break/>#<text:line-break/># Usage: <text:s/>./ovpn2uci.sh &lt;config_file&gt; [interface_name] &gt; /tmp/openvpn-uci-setup.sh<text:line-break/>#<text:tab/>the `interface_name` bust be less than 15 characters and cannot contain a hyphen! <text:line-break/># <text:tab/>inspect the output script and execute if OK<text:line-break/>#<text:tab/>restart network: `service network restart`<text:line-break/># Output: UCI shell commands printed to stdout; redirect to a file or pipe to sh<text:line-break/># Version: 20-may-2026 <text:line-break/># Authored by: egc112 and Claude<text:line-break/># <text:line-break/># Notes:<text:line-break/># <text:s text:c="2"/>• ash/busybox compatible — no bash-specific features<text:line-break/># <text:s text:c="2"/>• Inline blocks (&lt;ca&gt;, &lt;cert&gt;, &lt;key&gt;, &lt;tls-crypt&gt;, …) are written to<text:line-break/># <text:s text:c="4"/>temp files during processing, then emitted as heredocs pointing to<text:line-break/># <text:s text:c="4"/>INLINE_DIR at runtime.<text:line-break/># <text:s text:c="2"/>• Options that appear more than once are emitted with `uci add_list`.<text:line-break/># <text:s text:c="2"/>• The OpenVPN `proto` option is stored as `vpn_proto` to avoid clashing<text:line-break/># <text:s text:c="4"/>with the netifd `proto=openvpn` key.<text:line-break/># <text:s text:c="2"/>• Unknown / unsupported options are emitted as comments so nothing is<text:line-break/># <text:s text:c="4"/>silently dropped.<text:line-break/><text:line-break/>set -e<text:line-break/><text:line-break/># ─── Configuration ───────────────────────────────────────────────────────────<text:line-break/>CONFIG_FILE="${1:-}"<text:line-break/>NAME="${2:-ovpn}"<text:line-break/>OPTIONS_FILE="/usr/share/openvpn/openvpn.options"<text:line-break/>INLINE_DIR="/etc/openvpn"<text:line-break/>TMPDIR="/tmp/ovpn2uci_$$"<text:line-break/><text:line-break/># ─── Cleanup on exit ─────────────────────────────────────────────────────────<text:line-break/>trap 'rm -rf "$TMPDIR"' EXIT<text:line-break/>mkdir -p "$TMPDIR"<text:line-break/><text:line-break/># ─── Argument validation ─────────────────────────────────────────────────────<text:line-break/>if [ -z "$CONFIG_FILE" ]; then<text:line-break/> <text:s text:c="3"/>echo "Usage: $0 &lt;config_file&gt; [interface_name]" &gt;&amp;2<text:line-break/> <text:s text:c="3"/>exit 1<text:line-break/>fi<text:line-break/>if [ ! -f "$CONFIG_FILE" ]; then<text:line-break/> <text:s text:c="3"/>echo "Error: config file '$CONFIG_FILE' not found" &gt;&amp;2<text:line-break/> <text:s text:c="3"/>exit 1<text:line-break/>fi<text:line-break/><text:line-break/># ─── Load the option type lists ──────────────────────────────────────────────<text:line-break/>OPENVPN_PARAMS=""<text:line-break/>OPENVPN_PARAMS_STRING=""<text:line-break/>OPENVPN_UINTS=""<text:line-break/>OPENVPN_BOOLS=""<text:line-break/>OPENVPN_LIST=""<text:line-break/><text:soft-page-break/>if [ -f "$OPTIONS_FILE" ]; then<text:line-break/> <text:s text:c="3"/># shellcheck disable=SC1090<text:line-break/> <text:s text:c="3"/>. "$OPTIONS_FILE"<text:line-break/> <text:s text:c="3"/># Merge all parameter-taking variants into one list<text:line-break/> <text:s text:c="3"/>OPENVPN_PARAMS="$OPENVPN_LIST<text:line-break/>$OPENVPN_PARAMS_STRING<text:line-break/>$OPENVPN_UINTS"<text:line-break/>else<text:line-break/> <text:s text:c="3"/>echo "# WARNING: '$OPTIONS_FILE' not found — option validation disabled" &gt;&amp;2<text:line-break/>fi<text:line-break/><text:line-break/># ─── Helper functions ────────────────────────────────────────────────────────<text:line-break/><text:line-break/># Normalise an option name: hyphens → underscores, lower-case<text:line-break/>normalize() { printf '%s' "$1" | tr '-' '_' | tr 'A-Z' 'a-z'; }<text:line-break/><text:line-break/># Return true (0) when $1 exactly matches a word in newline-separated list $2<text:line-break/>in_set() { printf '%s' "$2" | grep -qw "$1"; }<text:line-break/><text:line-break/># Extract opening inline tag name from a line like &lt;tls-crypt&gt;; empty if no match<text:line-break/>open_tag() { printf '%s' "$1" | sed -n 's/^&lt;\([a-zA-Z][a-zA-Z0-9_-]*\)&gt;$/\1/p'; }<text:line-break/><text:line-break/># Extract closing inline tag name from a line like &lt;/tls-crypt&gt;; empty if no match<text:line-break/>close_tag() { printf '%s' "$1" | sed -n 's/^&lt;\/\([a-zA-Z][a-zA-Z0-9_-]*\)&gt;$/\1/p'; }<text:line-break/><text:line-break/># Return option count stored in a temp file (default 0)<text:line-break/>opt_count() {<text:line-break/> <text:s text:c="3"/>_safe=$(normalize "$1" | tr -c 'a-zA-Z0-9_' '_')<text:line-break/> <text:s text:c="3"/>_cf="$TMPDIR/count_$_safe"<text:line-break/> <text:s text:c="3"/>[ -f "$_cf" ] &amp;&amp; cat "$_cf" || printf '0'<text:line-break/>}<text:line-break/><text:line-break/># ─── PASS 1 — collect inline blocks into temp files ──────────────────────────<text:line-break/>INLINE_TAGS="" <text:s text:c="2"/># space-separated list of tag names seen<text:line-break/>in_block=0<text:line-break/>cur_tag=""<text:line-break/><text:line-break/>while IFS= read -r line || [ -n "$line" ]; do<text:line-break/> <text:s text:c="3"/>otag=$(open_tag "$line")<text:line-break/> <text:s text:c="3"/>ctag=$(close_tag "$line")<text:line-break/><text:line-break/> <text:s text:c="3"/>if [ -n "$otag" ]; then<text:line-break/> <text:s text:c="7"/>in_block=1<text:line-break/> <text:s text:c="7"/>cur_tag="$otag"<text:line-break/> <text:s text:c="7"/>: &gt; "$TMPDIR/inline_$cur_tag" <text:s text:c="3"/># create / truncate<text:line-break/> <text:s text:c="7"/>continue<text:line-break/> <text:s text:c="3"/>fi<text:line-break/><text:line-break/> <text:s text:c="3"/>if [ -n "$ctag" ] &amp;&amp; [ "$in_block" = "1" ]; then<text:line-break/> <text:s text:c="7"/>in_block=0<text:line-break/> <text:s text:c="7"/>INLINE_TAGS="$INLINE_TAGS $cur_tag"<text:line-break/> <text:s text:c="7"/>cur_tag=""<text:line-break/> <text:s text:c="7"/>continue<text:line-break/> <text:s text:c="3"/>fi<text:line-break/><text:line-break/> <text:s text:c="3"/>[ "$in_block" = "1" ] &amp;&amp; printf '%s\n' "$line" &gt;&gt; "$TMPDIR/inline_$cur_tag"<text:line-break/>done &lt; "$CONFIG_FILE"<text:line-break/><text:soft-page-break/><text:line-break/># ─── PASS 2 — count occurrences of each option (to detect repeats) ───────────<text:line-break/>in_block=0<text:line-break/><text:line-break/>while IFS= read -r line || [ -n "$line" ]; do<text:line-break/> <text:s text:c="3"/># skip blank lines and comments<text:line-break/> <text:s text:c="3"/>case "$line" in ''|'#'*) continue ;; esac<text:line-break/> <text:s text:c="3"/># also skip lines that are only whitespace<text:line-break/> <text:s text:c="3"/>stripped=$(printf '%s' "$line" | tr -d '[:space:]')<text:line-break/> <text:s text:c="3"/>[ -z "$stripped" ] &amp;&amp; continue<text:line-break/><text:line-break/> <text:s text:c="3"/>otag=$(open_tag "$line")<text:line-break/> <text:s text:c="3"/>if [ -n "$otag" ]; then in_block=1; continue; fi<text:line-break/> <text:s text:c="3"/>ctag=$(close_tag "$line")<text:line-break/> <text:s text:c="3"/>if [ -n "$ctag" ]; then in_block=0; continue; fi<text:line-break/> <text:s text:c="3"/>if [ "$in_block" = "1" ]; then continue; fi<text:line-break/><text:line-break/> <text:s text:c="3"/>raw=$(printf '%s' "$line" | awk '{print $1}')<text:line-break/> <text:s text:c="3"/>norm=$(normalize "$raw")<text:line-break/> <text:s text:c="3"/># Sanitize: replace chars not valid in a filename (e.g. / in base64) with _<text:line-break/> <text:s text:c="3"/>safe=$(printf '%s' "$norm" | tr -c 'a-zA-Z0-9_' '_')<text:line-break/> <text:s text:c="3"/>cf="$TMPDIR/count_$safe"<text:line-break/> <text:s text:c="3"/>if [ -f "$cf" ]; then<text:line-break/> <text:s text:c="7"/>c=$(cat "$cf")<text:line-break/> <text:s text:c="7"/>printf '%d' "$((c + 1))" &gt; "$cf"<text:line-break/> <text:s text:c="3"/>else<text:line-break/> <text:s text:c="7"/>printf '1' &gt; "$cf"<text:line-break/> <text:s text:c="3"/>fi<text:line-break/>done &lt; "$CONFIG_FILE"<text:line-break/><text:line-break/># ─── Build skip list from inline tags ────────────────────────────────────────<text:line-break/>SKIP_OPT=""<text:line-break/>for tag in $INLINE_TAGS; do<text:line-break/> <text:s text:c="3"/>SKIP_OPT="$SKIP_OPT $(normalize "$tag")"<text:line-break/>done<text:line-break/><text:line-break/># ─── Emit UCI header ─────────────────────────────────────────────────────────<text:line-break/>printf '#!/bin/sh\n'<text:line-break/>printf '# Generated by ovpn2uci.sh from: %s\n\n' "$CONFIG_FILE"<text:line-break/><text:line-break/>printf "name='%s'\n\n" "$NAME"<text:line-break/>printf "uci set network.\${name}='interface'\n"<text:line-break/>printf "uci set network.\${name}.proto='openvpn'\n"<text:line-break/><text:line-break/># ─── Emit inline blocks ──────────────────────────────────────────────────────<text:line-break/>if [ -n "$INLINE_TAGS" ]; then<text:line-break/> <text:s text:c="3"/>printf '\n# -- Inline certificate / key blocks ----------------------------------\n'<text:line-break/> <text:s text:c="3"/>for tag in $INLINE_TAGS; do<text:line-break/> <text:s text:c="7"/>norm=$(normalize "$tag")<text:line-break/> <text:s text:c="7"/>case "$tag" in<text:line-break/> <text:s text:c="11"/>ca|cert|extra_certs) ext="crt" ;;<text:line-break/> <text:s text:c="11"/>key) <text:s text:c="16"/>ext="key" ;;<text:line-break/> <text:s text:c="11"/>*) <text:s text:c="18"/>ext="pem" ;;<text:line-break/> <text:s text:c="7"/>esac<text:line-break/> <text:s text:c="7"/>fpath="${INLINE_DIR}/${NAME}_${norm}.${ext}"<text:line-break/> <text:s text:c="7"/>printf "\ncat &gt; '%s' &lt;&lt; 'OVPN_INLINE_EOF'\n" "$fpath"<text:line-break/><text:soft-page-break/> <text:s text:c="7"/>cat "$TMPDIR/inline_$tag"<text:line-break/> <text:s text:c="7"/>printf 'OVPN_INLINE_EOF\n'<text:line-break/> <text:s text:c="7"/>printf "uci set network.\${name}.%s='%s'\n" "$norm" "$fpath"<text:line-break/> <text:s text:c="3"/>done<text:line-break/>fi<text:line-break/><text:line-break/># ─── PASS 3 — emit UCI for every regular option ──────────────────────────────<text:line-break/>printf '\n# -- OpenVPN options ---------------------------------------------------\n'<text:line-break/>in_block=0<text:line-break/><text:line-break/>while IFS= read -r line || [ -n "$line" ]; do<text:line-break/><text:line-break/> <text:s text:c="3"/># Skip blank lines and full-line comments<text:line-break/> <text:s text:c="3"/>case "$line" in ''|'#'*) continue ;; esac<text:line-break/> <text:s text:c="3"/>stripped=$(printf '%s' "$line" | tr -d '[:space:]')<text:line-break/> <text:s text:c="3"/>[ -z "$stripped" ] &amp;&amp; continue<text:line-break/><text:line-break/> <text:s text:c="3"/># Track inline blocks<text:line-break/> <text:s text:c="3"/>otag=$(open_tag "$line")<text:line-break/> <text:s text:c="3"/>if [ -n "$otag" ]; then in_block=1; continue; fi<text:line-break/> <text:s text:c="3"/>ctag=$(close_tag "$line")<text:line-break/> <text:s text:c="3"/>if [ -n "$ctag" ]; then in_block=0; continue; fi<text:line-break/> <text:s text:c="3"/>if [ "$in_block" = "1" ]; then continue; fi<text:line-break/><text:line-break/> <text:s text:c="3"/># Split keyword and value<text:line-break/> <text:s text:c="3"/>raw=$(printf '%s' "$line" | awk '{print $1}')<text:line-break/> <text:s text:c="3"/>norm=$(normalize "$raw")<text:line-break/> <text:s text:c="3"/># Value = everything after keyword, left-trimmed<text:line-break/> <text:s text:c="3"/>value=$(printf '%s' "$line" | sed "s/^${raw}//" | sed 's/^[[:space:]]*//')<text:line-break/><text:line-break/> <text:s text:c="3"/># Skip options already covered by an inline block<text:line-break/> <text:s text:c="3"/>case " $SKIP_OPT " in<text:line-break/> <text:s text:c="7"/>*" $norm "*)<text:line-break/> <text:s text:c="11"/>printf '# Skipped (%s set by inline block above)\n' "$raw"<text:line-break/> <text:s text:c="11"/>continue<text:line-break/> <text:s text:c="11"/>;;<text:line-break/> <text:s text:c="3"/>esac<text:line-break/><text:line-break/> <text:s text:c="3"/># Special case: `proto` clashes with netifd proto=openvpn<text:line-break/> <text:s text:c="3"/>if [ "$norm" = "proto" ]; then<text:line-break/> <text:s text:c="7"/>printf '# NOTE: openvpn proto stored as vpn_proto to avoid netifd conflict\n'<text:line-break/> <text:s text:c="7"/>printf "uci set network.\${name}.vpn_proto='%s'\n" "$value"<text:line-break/> <text:s text:c="7"/>continue<text:line-break/> <text:s text:c="3"/>fi<text:line-break/><text:line-break/> <text:s text:c="3"/># Special case: `remote [host] [port]`<text:line-break/> <text:s text:c="3"/># With one parameter it is the remote host; with two the second is the port.<text:line-break/><text:tab/># might need to remove this<text:line-break/> <text:s text:c="3"/>if [ "$norm" = "remote" ]; then<text:line-break/> <text:s text:c="7"/>r_host=$(printf '%s' "$value" | awk '{print $1}')<text:line-break/> <text:s text:c="7"/>r_port=$(printf '%s' "$value" | awk '{print $2}')<text:line-break/> <text:s text:c="7"/>c=$(opt_count "$norm")<text:line-break/> <text:s text:c="7"/>if [ "$c" -gt 1 ]; then<text:line-break/> <text:s text:c="11"/>printf "uci add_list network.\${name}.remote='%s'\n" "$r_host"<text:line-break/> <text:s text:c="7"/>else<text:line-break/> <text:s text:c="11"/>printf "uci set network.\${name}.remote='%s'\n" "$r_host"<text:line-break/> <text:s text:c="7"/>fi<text:line-break/> <text:s text:c="7"/>if [ -n "$r_port" ]; then<text:line-break/><text:soft-page-break/> <text:s text:c="11"/>printf "uci set network.\${name}.port='%s'\n" "$r_port"<text:line-break/> <text:s text:c="7"/>fi<text:line-break/> <text:s text:c="7"/>continue<text:line-break/> <text:s text:c="3"/>fi<text:line-break/><text:line-break/> <text:s text:c="3"/># Classify and emit<text:line-break/> <text:s text:c="3"/>if in_set "$norm" "$OPENVPN_BOOLS"; then<text:line-break/> <text:s text:c="7"/># Boolean flag — presence means true<text:line-break/> <text:s text:c="7"/>printf "uci set network.\${name}.%s='1'\n" "$norm"<text:line-break/><text:line-break/> <text:s text:c="3"/>elif in_set "$norm" "$OPENVPN_LIST"; then<text:line-break/> <text:s text:c="7"/># List type (e.g. data_ciphers) — one add_list per occurrence<text:line-break/> <text:s text:c="7"/>printf "uci add_list network.\${name}.%s='%s'\n" "$norm" "$value"<text:line-break/><text:line-break/> <text:s text:c="3"/>elif in_set "$norm" "$OPENVPN_PARAMS"; then<text:line-break/> <text:s text:c="7"/># Regular param — use add_list if option appears more than once<text:line-break/> <text:s text:c="7"/>c=$(opt_count "$norm")<text:line-break/> <text:s text:c="7"/>if [ "$c" -gt 1 ]; then<text:line-break/> <text:s text:c="11"/>printf "uci add_list network.\${name}.%s='%s'\n" "$norm" "$value"<text:line-break/> <text:s text:c="7"/>else<text:line-break/> <text:s text:c="11"/>printf "uci set network.\${name}.%s='%s'\n" "$norm" "$value"<text:line-break/> <text:s text:c="7"/>fi<text:line-break/><text:line-break/> <text:s text:c="3"/>else<text:line-break/> <text:s text:c="7"/># Unknown — preserve as comment so nothing is silently lost<text:line-break/> <text:s text:c="7"/>printf '# Unknown/unsupported option (skipped): %s\n' "$line"<text:line-break/> <text:s text:c="3"/>fi<text:line-break/><text:line-break/>done &lt; "$CONFIG_FILE"<text:line-break/><text:line-break/>printf '\nuci commit network\n'<text:line-break/></text:p>
      <text:p text:style-name="P78"/>
      <text:p text:style-name="P78"/>
      <text:p text:style-name="P79">UCI script</text:p>
      <text:p text:style-name="P79"/>
      <text:p text:style-name="P80">Directory with ucode files and option files</text:p>
      <text:p text:style-name="P80">/usr/share/openvpn/</text:p>
      <text:p text:style-name="P80"/>
      <text:p text:style-name="P80">Options file: <text:span text:style-name="T2">/usr/share/openvpn/openvpn.options</text:span> use as matrix for options</text:p>
      <text:p text:style-name="P80"/>
      <text:p text:style-name="P80"/>
      <text:p text:style-name="P79">name='ovpnserver'</text:p>
      <text:p text:style-name="P79"/>
      <text:p text:style-name="P79">uci set network.${name}='interface'</text:p>
      <text:p text:style-name="P79">uci set network.${name}.proto='openvpn'</text:p>
      <text:p text:style-name="P79"/>
      <text:p text:style-name="P81">dev-type tun</text:p>
      <text:p text:style-name="P79">uci set network.${name}.dev_t<text:span text:style-name="T77">y</text:span>pe='tun'</text:p>
      <text:p text:style-name="P79"/>
      <text:p text:style-name="P81">dev tun2</text:p>
      <text:p text:style-name="P79">uci set network.${name}.dev='tun2'</text:p>
      <text:p text:style-name="P82"/>
      <text:p text:style-name="P83">$trusted_ip : host=server-ip</text:p>
      <text:p text:style-name="P84"/>
      <text:p text:style-name="P85">proto_add_ipv4_route "<text:span text:style-name="T78">$trusted_ip</text:span>" <text:span text:style-name="T78">32 $route_net_gateway</text:span></text:p>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swiss"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roman" style:font-pitch="variable"/>
    <style:font-face style:name="Consolas1" svg:font-family="Consolas" style:font-family-generic="swiss" style:font-pitch="variable"/>
    <style:font-face style:name="Consolas2" svg:font-family="Consolas"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true" fo:text-align="left" style:justify-single-word="false" fo:orphans="2" fo:widows="2" fo:hyphenation-ladder-count="no-limit" fo:hyphenation-keep="page" loext:hyphenation-keep-type="column" loext:hyphenation-keep-line="false" style:snap-to-layout-grid="false" style:writing-mode="lr-tb"/>
      <style:text-properties style:use-window-font-color="true" loext:opacity="0%" style:font-name="Arial" fo:font-family="Arial" style:font-family-generic="swiss" style:font-pitch="variable" fo:font-size="11pt" fo:language="en" fo:country="US" style:letter-kerning="true" style:font-name-asian="Aptos1" style:font-family-asian="Apto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swiss" style:font-pitch="variable" fo:font-size="16pt" style:font-size-asian="20pt"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Kop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swiss" style:font-pitch="variable" fo:font-size="14pt" style:font-size-asian="15pt"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Kop_20_3_20_Char" style:default-outline-level="3" style:list-style-name="" style:class="chapter">
      <style:paragraph-properties fo:margin-top="0.282cm" fo:margin-bottom="0.141cm" style:contextual-spacing="false" fo:keep-together="always" fo:keep-with-next="always"/>
      <style:text-properties fo:color="#0f4761" loext:opacity="100%" fo:font-size="13pt" style:font-size-asian="14pt"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Kop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list-style-name="" style:class="chapter">
      <style:paragraph-properties fo:margin-top="0.141cm" fo:margin-bottom="0.071cm" style:contextual-spacing="false" fo:keep-together="always" fo:keep-with-next="always"/>
      <style:text-properties fo:color="#0f4761" loext:opacity="100%">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style-asian="italic"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Kop_20_7_20_Char" style:default-outline-level="7" style:list-style-name="" style:class="chapter">
      <style:paragraph-properties fo:margin-top="0.071cm" fo:margin-bottom="0cm" style:contextual-spacing="false" fo:keep-together="always" fo:keep-with-next="always"/>
      <style:text-properties fo:color="#595959" loext:opacity="100%">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Kop_20_8_20_Char" style:default-outline-level="8" style:list-style-name="" style:class="chapter">
      <style:paragraph-properties fo:keep-together="always" fo:keep-with-next="always"/>
      <style:text-properties fo:color="#272727" loext:opacity="100%" fo:font-style="italic" style:font-style-asian="italic"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Kop_20_9_20_Char" style:default-outline-level="9" style:list-style-name="" style:class="chapter">
      <style:paragraph-properties fo:keep-together="always" fo:keep-with-next="always"/>
      <style:text-properties fo:color="#272727" loext:opacity="100%">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Char" style:class="chapter">
      <style:paragraph-properties fo:margin-top="0cm" fo:margin-bottom="0.141cm" style:contextual-spacing="true"/>
      <style:text-properties style:font-name="Aptos Display" fo:font-family="'Aptos Display'" style:font-family-generic="swiss" style:font-pitch="variable" fo:font-size="28pt" fo:letter-spacing="-0.018cm" style:font-size-asian="28pt"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cm" fo:margin-bottom="0cm" style:contextual-spacing="false" fo:line-height="100%"/>
      <style:text-properties fo:font-size="16pt" fo:language="en" fo:country="US" style:letter-kerning="false" style:font-size-asian="16pt" style:language-asian="nl" style:country-asian="NL"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Voettekst_20_Char" style:class="extra">
      <style:paragraph-properties>
        <style:tab-stops>
          <style:tab-stop style:position="8.001cm" style:type="center"/>
          <style:tab-stop style:position="16.002cm" style:type="right"/>
        </style:tab-stops>
      </style:paragraph-properties>
    </style:style>
    <style:style style:name="Contents_20_5" style:display-name="Contents 5" style:family="paragraph" style:parent-style-name="Index" style:class="index">
      <style:paragraph-properties fo:margin-left="2cm">
        <style:tab-stops>
          <style:tab-stop style:position="16.461cm" style:type="right" style:leader-style="dotted" style:leader-text="."/>
        </style:tab-stops>
      </style:paragraph-properties>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Header" style:family="paragraph" style:parent-style-name="Standard" loext:linked-style-name="Koptekst_20_Char"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swiss" style:font-pitch="variable" fo:font-size="11pt" fo:language="nl" fo:country="NL" style:letter-kerning="true" style:font-name-asian="Aptos1" style:font-family-asian="Apto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Intense_20_Quote" style:display-name="Intense Quote" style:family="paragraph" style:parent-style-name="Standard" style:next-style-name="Standard" loext:linked-style-name="Duidelijk_20_citaat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Quote" style:family="paragraph" style:parent-style-name="Standard" style:next-style-name="Standard" loext:linked-style-name="Citaat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itle" style:family="paragraph" style:parent-style-name="Standard" style:next-style-name="Standard" loext:linked-style-name="Ondertitel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Voettekst_20_Char" style:display-name="Voettekst Char" style:family="text" style:parent-style-name="Default_20_Paragraph_20_Font" loext:linked-style-name="Footer">
      <style:text-properties style:font-name="Calibri" fo:font-family="Calibri" style:font-family-generic="swiss" style:font-pitch="variable" fo:font-size="11pt" style:font-size-asian="11pt"/>
    </style:style>
    <style:style style:name="Koptekst_20_Char" style:display-name="Koptekst Char" style:family="text" style:parent-style-name="Default_20_Paragraph_20_Font" loext:linked-style-name="Header">
      <style:text-properties style:font-name="Calibri" fo:font-family="Calibri" style:font-family-generic="swiss" style:font-pitch="variable" fo:font-size="11pt" style:font-size-asian="11pt"/>
    </style:style>
    <style:style style:name="Emphasis" style:family="text" style:parent-style-name="Default_20_Paragraph_20_Font">
      <style:text-properties fo:font-style="italic" style:font-style-asian="italic" style:font-style-complex="italic"/>
    </style:style>
    <style:style style:name="st" style:family="text" style:parent-style-name="Default_20_Paragraph_20_Font"/>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Duidelijk_20_citaat_20_Char" style:display-name="Duidelijk citaat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at_20_Char" style:display-name="Citaat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Ondertitel_20_Char" style:display-name="Ondertitel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size-complex="14pt">
        <loext:char-complex-color loext:theme-type="dark1" loext:color-type="theme">
          <loext:transformation loext:type="tint" loext:value="3490"/>
        </loext:char-complex-color>
      </style:text-properties>
    </style:style>
    <style:style style:name="Titel_20_Char" style:display-name="Titel Char" style:family="text" style:parent-style-name="Default_20_Paragraph_20_Font" loext:linked-style-name="Title">
      <style:text-properties style:font-name="Aptos Display" fo:font-family="'Aptos Display'" style:font-family-generic="swiss" style:font-pitch="variable" fo:font-size="28pt" fo:letter-spacing="-0.018cm" style:letter-kerning="true" style:font-name-asian="Aptos1" style:font-family-asian="Aptos" style:font-family-generic-asian="system" style:font-pitch-asian="variable" style:font-size-asian="28pt" style:font-size-complex="28pt"/>
    </style:style>
    <style:style style:name="Kop_20_9_20_Char" style:display-name="Kop 9 Char" style:family="text" style:parent-style-name="Default_20_Paragraph_20_Font" loext:linked-style-name="Heading_20_9">
      <style:text-properties fo:color="#272727" loext:opacity="100%" style:font-name-asian="Aptos1" style:font-family-asian="Aptos" style:font-family-generic-asian="system" style:font-pitch-asian="variable">
        <loext:char-complex-color loext:theme-type="dark1" loext:color-type="theme">
          <loext:transformation loext:type="tint" loext:value="1529"/>
        </loext:char-complex-color>
      </style:text-properties>
    </style:style>
    <style:style style:name="Kop_20_8_20_Char" style:display-name="Kop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style-complex="italic">
        <loext:char-complex-color loext:theme-type="dark1" loext:color-type="theme">
          <loext:transformation loext:type="tint" loext:value="1529"/>
        </loext:char-complex-color>
      </style:text-properties>
    </style:style>
    <style:style style:name="Kop_20_7_20_Char" style:display-name="Kop 7 Char" style:family="text" style:parent-style-name="Default_20_Paragraph_20_Font" loext:linked-style-name="Heading_20_7">
      <style:text-properties fo:color="#595959" loext:opacity="100%" style:font-name-asian="Aptos1" style:font-family-asian="Aptos" style:font-family-generic-asian="system" style:font-pitch-asian="variable">
        <loext:char-complex-color loext:theme-type="dark1" loext:color-type="theme">
          <loext:transformation loext:type="tint" loext:value="3490"/>
        </loext:char-complex-color>
      </style:text-properties>
    </style:style>
    <style:style style:name="Kop_20_6_20_Char" style:display-name="Kop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style-complex="italic">
        <loext:char-complex-color loext:theme-type="dark1" loext:color-type="theme">
          <loext:transformation loext:type="tint" loext:value="3490"/>
        </loext:char-complex-color>
      </style:text-properties>
    </style:style>
    <style:style style:name="Kop_20_5_20_Char" style:display-name="Kop 5 Char" style:family="text" style:parent-style-name="Default_20_Paragraph_20_Font" loext:linked-style-name="Heading_20_5">
      <style:text-properties fo:color="#0f4761" loext:opacity="100%" style:font-name-asian="Aptos1" style:font-family-asian="Aptos" style:font-family-generic-asian="system" style:font-pitch-asian="variable">
        <loext:char-complex-color loext:theme-type="accent1" loext:color-type="theme">
          <loext:transformation loext:type="shade" loext:value="2509"/>
        </loext:char-complex-color>
      </style:text-properties>
    </style:style>
    <style:style style:name="Kop_20_4_20_Char" style:display-name="Kop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Kop_20_3_20_Char" style:display-name="Kop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size-complex="14pt">
        <loext:char-complex-color loext:theme-type="accent1" loext:color-type="theme">
          <loext:transformation loext:type="shade" loext:value="2509"/>
        </loext:char-complex-color>
      </style:text-properties>
    </style:style>
    <style:style style:name="Kop_20_2_20_Char" style:display-name="Kop 2 Char" style:family="text" style:parent-style-name="Default_20_Paragraph_20_Font" loext:linked-style-name="Heading_20_2">
      <style:text-properties fo:color="#0f4761" loext:opacity="100%" style:font-name="Aptos Display" fo:font-family="'Aptos Display'" style:font-family-generic="swiss" style:font-pitch="variable" fo:font-size="16pt" style:font-name-asian="Aptos1" style:font-family-asian="Aptos" style:font-family-generic-asian="system" style:font-pitch-asian="variable" style:font-size-asian="16pt" style:font-size-complex="16pt">
        <loext:char-complex-color loext:theme-type="accent1" loext:color-type="theme">
          <loext:transformation loext:type="shade" loext:value="2509"/>
        </loext:char-complex-color>
      </style:text-properties>
    </style:style>
    <style:style style:name="Kop_20_1_20_Char" style:display-name="Kop 1 Char" style:family="text" style:parent-style-name="Default_20_Paragraph_20_Font" loext:linked-style-name="Heading_20_1">
      <style:text-properties fo:color="#0f4761" loext:opacity="100%" style:font-name="Aptos Display" fo:font-family="'Aptos Display'" style:font-family-generic="swiss" style:font-pitch="variable" fo:font-size="20pt" style:font-name-asian="Aptos1" style:font-family-asian="Aptos" style:font-family-generic-asian="system" style:font-pitch-asian="variable" style:font-size-asian="20pt" style:font-size-complex="20pt">
        <loext:char-complex-color loext:theme-type="accent1" loext:color-type="theme">
          <loext:transformation loext:type="shade" loext:value="2509"/>
        </loext:char-complex-color>
      </style:text-properties>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language="en" fo:country="US" fo:background-color="#ffff00"/>
    </style:style>
    <style:style style:name="ListLabel_20_20" style:display-name="ListLabel 20" style:family="text">
      <style:text-properties fo:language="en" fo:country="US"/>
    </style:style>
    <style:style style:name="ListLabel_20_21" style:display-name="ListLabel 21" style:family="text">
      <style:text-properties fo:language="en" fo:country="US" fo:font-style="italic" style:font-style-asian="italic" style:font-style-complex="italic"/>
    </style:style>
    <style:style style:name="ListLabel_20_22" style:display-name="ListLabel 22" style:family="text">
      <style:text-properties fo:color="#4f81bd" loext:opacity="100%" fo:language="en" fo:country="US" style:font-size-complex="11pt"/>
    </style:style>
    <style:style style:name="ListLabel_20_23" style:display-name="ListLabel 23" style:family="text">
      <style:text-properties fo:language="en" fo:country="US" style:font-size-complex="11pt"/>
    </style:style>
    <style:style style:name="ListLabel_20_24" style:display-name="ListLabel 24" style:family="text">
      <style:text-properties style:font-name="Calibri" fo:font-family="Calibri" style:font-family-generic="swiss" style:font-pitch="variable" fo:language="en" fo:country="US" style:font-size-complex="11pt"/>
    </style:style>
    <style:style style:name="ListLabel_20_25" style:display-name="ListLabel 25" style:family="text">
      <style:text-properties fo:color="#000000" loext:opacity="100%" fo:language="en" fo:country="US" style:font-name-complex="Consolas2" style:font-family-complex="Consolas" style:font-family-generic-complex="system" style:font-pitch-complex="variable"/>
    </style:style>
    <style:style style:name="ListLabel_20_26" style:display-name="ListLabel 26" style:family="text">
      <style:text-properties style:font-name="Consolas" fo:font-family="Consolas" style:font-family-generic="roman" style:font-pitch="variable" fo:font-size="10pt" fo:language="en" fo:country="US" style:font-size-asian="10pt" style:font-size-complex="10pt"/>
    </style:style>
    <style:style style:name="ListLabel_20_27" style:display-name="ListLabel 27" style:family="text">
      <style:text-properties fo:language="en" fo:country="GB"/>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svg:width="0.041cm" fo:min-height="0.041cm" text:anchor-type="as-char" svg:x="0cm" svg:y="0cm" style:wrap="none" style:vertical-pos="top" style:vertical-rel="baseline" style:horizontal-pos="left" style:horizontal-rel="paragraph-start-margin" fo:background-color="transparent" draw:fill="none" draw:fill-color="#729fcf" draw:wrap-influence-on-position="once-concurrent" loext:allow-overlap="true"/>
    </style:style>
    <style:style style:name="Frame" style:family="graphic">
      <style:graphic-properties svg:width="0.34cm" fo:min-height="0.34cm" text:anchor-type="as-char" svg:x="0cm" svg:y="0cm" fo:margin-left="0.101cm" fo:margin-right="0.101cm" fo:margin-top="0.101cm" fo:margin-bottom="0.101cm" style:wrap="none" style:vertical-pos="top" style:vertical-rel="baseline" style:horizontal-pos="left" style:horizontal-rel="paragraph-content" fo:background-color="transparent" draw:fill="none" draw:fill-color="#729fcf" fo:padding="0.15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Open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Standaard"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1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number:date-style style:name="N10045" number:language="en" number:country="US">
      <number:day/>
      <number:text>. </number:text>
      <number:month number:textual="true"/>
      <number:text>. </number:text>
      <number:year number:style="long"/>
    </number:date-style>
  </office:automatic-styles>
  <office:master-styles>
    <style:master-page style:name="Standard" style:page-layout-name="Mpm1" draw:style-name="Mdp1">
      <style:footer>
        <text:p text:style-name="MP1" loext:marker-style-name="MT1">OpenWRT by egc<text:tab/><text:date style:data-style-name="N10045" text:date-value="2026-06-29T18:54:39.609176376">29. Jun. 2026</text:date><text:tab/><text:page-number text:select-page="current">15</text:page-number><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8T11:52:19.278061400</meta:creation-date>
    <dc:language>nl-NL</dc:language>
    <meta:editing-cycles>96</meta:editing-cycles>
    <meta:editing-duration>PT9H7M32S</meta:editing-duration>
    <meta:generator>LibreOffice/26.2.1.2$Windows_X86_64 LibreOffice_project/620$Build-2</meta:generator>
    <dc:title>OpenWRT1</dc:title>
    <meta:initial-creator>e c</meta:initial-creator>
    <dc:date>2026-06-29T18:49:25.892468700</dc:date>
    <dc:creator>e c</dc:creator>
    <meta:print-date>2026-06-29T18:54:36.532469300</meta:print-date>
    <meta:printed-by>PDF files: e c</meta:printed-by>
    <meta:document-statistic meta:table-count="0" meta:image-count="10" meta:object-count="0" meta:page-count="15" meta:paragraph-count="189" meta:word-count="2777" meta:character-count="19162" meta:non-whitespace-character-count="15629"/>
    <meta:user-defined meta:name="AppVersion">15.0000</meta:user-defined>
    <meta:template xlink:type="simple" xlink:actuate="onRequest" xlink:title="OpenWRT1" xlink:href="../../Users/gconijn/AppData/Roaming/LibreOffice/4/user/template/OpenWRT12.ott" meta:date="2026-05-18T11:52:18.763947900"/>
  </office:meta>
</office:document-meta>
</file>